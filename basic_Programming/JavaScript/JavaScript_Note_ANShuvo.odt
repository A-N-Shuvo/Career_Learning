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3576in" table:align="left"/>
    </style:style>
    <style:style style:name="Table1.A" style:family="table-column">
      <style:table-column-properties style:column-width="1.0083in"/>
    </style:style>
    <style:style style:name="Table1.B" style:family="table-column">
      <style:table-column-properties style:column-width="1.349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9014in" table:align="left"/>
    </style:style>
    <style:style style:name="Table2.A" style:family="table-column">
      <style:table-column-properties style:column-width="1.6986in"/>
    </style:style>
    <style:style style:name="Table2.B" style:family="table-column">
      <style:table-column-properties style:column-width="2.202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4118in" table:align="left"/>
    </style:style>
    <style:style style:name="Table3.A" style:family="table-column">
      <style:table-column-properties style:column-width="0.8924in"/>
    </style:style>
    <style:style style:name="Table3.B" style:family="table-column">
      <style:table-column-properties style:column-width="2.519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0486in" table:align="left"/>
    </style:style>
    <style:style style:name="Table4.A" style:family="table-column">
      <style:table-column-properties style:column-width="1.2132in"/>
    </style:style>
    <style:style style:name="Table4.B" style:family="table-column">
      <style:table-column-properties style:column-width="1.835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4458in" table:align="left"/>
    </style:style>
    <style:style style:name="Table5.A" style:family="table-column">
      <style:table-column-properties style:column-width="2.0146in"/>
    </style:style>
    <style:style style:name="Table5.B" style:family="table-column">
      <style:table-column-properties style:column-width="1.4313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5257in" table:align="left"/>
    </style:style>
    <style:style style:name="Table6.A" style:family="table-column">
      <style:table-column-properties style:column-width="1.1576in"/>
    </style:style>
    <style:style style:name="Table6.B" style:family="table-column">
      <style:table-column-properties style:column-width="1.368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1.3014in" table:align="left"/>
    </style:style>
    <style:style style:name="Table7.A" style:family="table-column">
      <style:table-column-properties style:column-width="0.6826in"/>
    </style:style>
    <style:style style:name="Table7.B" style:family="table-column">
      <style:table-column-properties style:column-width="0.6188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2.2444in" table:align="left"/>
    </style:style>
    <style:style style:name="Table8.A" style:family="table-column">
      <style:table-column-properties style:column-width="1.1771in"/>
    </style:style>
    <style:style style:name="Table8.B" style:family="table-column">
      <style:table-column-properties style:column-width="1.0674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2.7604in" table:align="left"/>
    </style:style>
    <style:style style:name="Table9.A" style:family="table-column">
      <style:table-column-properties style:column-width="1.3458in"/>
    </style:style>
    <style:style style:name="Table9.B" style:family="table-column">
      <style:table-column-properties style:column-width="1.4146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4.084in" table:align="left"/>
    </style:style>
    <style:style style:name="Table10.A" style:family="table-column">
      <style:table-column-properties style:column-width="1.5694in"/>
    </style:style>
    <style:style style:name="Table10.B" style:family="table-column">
      <style:table-column-properties style:column-width="2.5146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3.0806in" table:align="left"/>
    </style:style>
    <style:style style:name="Table11.A" style:family="table-column">
      <style:table-column-properties style:column-width="1.5646in"/>
    </style:style>
    <style:style style:name="Table11.B" style:family="table-column">
      <style:table-column-properties style:column-width="1.516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2.9924in" table:align="left"/>
    </style:style>
    <style:style style:name="Table12.A" style:family="table-column">
      <style:table-column-properties style:column-width="1.3472in"/>
    </style:style>
    <style:style style:name="Table12.B" style:family="table-column">
      <style:table-column-properties style:column-width="1.6451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Heading_20_2">
      <style:paragraph-properties fo:margin-top="0in" fo:margin-bottom="0.0972in" style:contextual-spacing="false" fo:line-height="115%"/>
      <style:text-properties fo:font-size="24pt" officeooo:paragraph-rsid="0021eeba" style:font-size-asian="24pt" style:font-size-complex="24pt"/>
    </style:style>
    <style:style style:name="P15" style:family="paragraph" style:parent-style-name="Heading_20_1">
      <style:paragraph-properties fo:margin-top="0in" fo:margin-bottom="0.0972in" style:contextual-spacing="false" fo:line-height="115%"/>
    </style:style>
    <style:style style:name="P16" style:family="paragraph" style:parent-style-name="Horizontal_20_Line">
      <style:paragraph-properties fo:margin-top="0in" fo:margin-bottom="0.0972in" style:contextual-spacing="false" fo:line-height="115%"/>
    </style:style>
    <style:style style:name="P17" style:family="paragraph" style:parent-style-name="Heading_20_3">
      <style:paragraph-properties fo:margin-top="0in" fo:margin-bottom="0.0972in" style:contextual-spacing="false" fo:line-height="115%"/>
    </style:style>
    <style:style style:name="P18" style:family="paragraph" style:parent-style-name="Preformatted_20_Text">
      <style:paragraph-properties fo:margin-top="0in" fo:margin-bottom="0.0972in" style:contextual-spacing="false" fo:line-height="115%"/>
    </style:style>
    <style:style style:name="P19" style:family="paragraph" style:parent-style-name="Heading_20_2">
      <style:paragraph-properties fo:margin-top="0in" fo:margin-bottom="0.0972in" style:contextual-spacing="false" fo:line-height="115%"/>
    </style:style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7"/>
    <style:style style:name="P25" style:family="paragraph" style:parent-style-name="Text_20_body" style:list-style-name="L18"/>
    <style:style style:name="P26" style:family="paragraph" style:parent-style-name="Text_20_body" style:list-style-name="L19"/>
    <style:style style:name="P27" style:family="paragraph" style:parent-style-name="Text_20_body" style:list-style-name="L20"/>
    <style:style style:name="P28" style:family="paragraph" style:parent-style-name="Text_20_body" style:list-style-name="L21"/>
    <style:style style:name="P29" style:family="paragraph" style:parent-style-name="Text_20_body" style:list-style-name="L22"/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 style:list-style-name="L25"/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1"/>
    <style:style style:name="P39" style:family="paragraph" style:parent-style-name="Text_20_body" style:list-style-name="L32"/>
    <style:style style:name="P40" style:family="paragraph" style:parent-style-name="Text_20_body" style:list-style-name="L33"/>
    <style:style style:name="P41" style:family="paragraph" style:parent-style-name="Text_20_body" style:list-style-name="L34"/>
    <style:style style:name="P42" style:family="paragraph" style:parent-style-name="Text_20_body" style:list-style-name="L35"/>
    <style:style style:name="P43" style:family="paragraph" style:parent-style-name="Text_20_body" style:list-style-name="L36"/>
    <style:style style:name="P44" style:family="paragraph" style:parent-style-name="Text_20_body" style:list-style-name="L37"/>
    <style:style style:name="P45" style:family="paragraph" style:parent-style-name="Text_20_body" style:list-style-name="L38"/>
    <style:style style:name="P46" style:family="paragraph" style:parent-style-name="Text_20_body" style:list-style-name="L39"/>
    <style:style style:name="P47" style:family="paragraph" style:parent-style-name="Text_20_body" style:list-style-name="L40"/>
    <style:style style:name="P48" style:family="paragraph" style:parent-style-name="Text_20_body" style:list-style-name="L41"/>
    <style:style style:name="P49" style:family="paragraph" style:parent-style-name="Text_20_body" style:list-style-name="L42"/>
    <style:style style:name="P50" style:family="paragraph" style:parent-style-name="Text_20_body" style:list-style-name="L43"/>
    <style:style style:name="P51" style:family="paragraph" style:parent-style-name="Text_20_body" style:list-style-name="L44"/>
    <style:style style:name="P52" style:family="paragraph" style:parent-style-name="Text_20_body" style:list-style-name="L45"/>
    <style:style style:name="P53" style:family="paragraph" style:parent-style-name="Text_20_body" style:list-style-name="L46"/>
    <style:style style:name="P54" style:family="paragraph" style:parent-style-name="Text_20_body" style:list-style-name="L47"/>
    <style:style style:name="P55" style:family="paragraph" style:parent-style-name="Text_20_body" style:list-style-name="L48"/>
    <style:style style:name="P56" style:family="paragraph" style:parent-style-name="Text_20_body" style:list-style-name="L49"/>
    <style:style style:name="P57" style:family="paragraph" style:parent-style-name="Text_20_body" style:list-style-name="L50"/>
    <style:style style:name="P58" style:family="paragraph" style:parent-style-name="Text_20_body" style:list-style-name="L51"/>
    <style:style style:name="P59" style:family="paragraph" style:parent-style-name="Text_20_body" style:list-style-name="L52"/>
    <style:style style:name="P60" style:family="paragraph" style:parent-style-name="Text_20_body" style:list-style-name="L53"/>
    <style:style style:name="P61" style:family="paragraph" style:parent-style-name="Text_20_body" style:list-style-name="L54"/>
    <style:style style:name="P62" style:family="paragraph" style:parent-style-name="Text_20_body" style:list-style-name="L55"/>
    <style:style style:name="P63" style:family="paragraph" style:parent-style-name="Text_20_body" style:list-style-name="L56"/>
    <style:style style:name="P64" style:family="paragraph" style:parent-style-name="Text_20_body" style:list-style-name="L57"/>
    <style:style style:name="P65" style:family="paragraph" style:parent-style-name="Text_20_body" style:list-style-name="L58"/>
    <style:style style:name="P66" style:family="paragraph" style:parent-style-name="Text_20_body" style:list-style-name="L59"/>
    <style:style style:name="P67" style:family="paragraph" style:parent-style-name="Text_20_body" style:list-style-name="L60"/>
    <style:style style:name="P68" style:family="paragraph" style:parent-style-name="Text_20_body" style:list-style-name="L61"/>
    <style:style style:name="P69" style:family="paragraph" style:parent-style-name="Text_20_body" style:list-style-name="L62"/>
    <style:style style:name="P70" style:family="paragraph" style:parent-style-name="Text_20_body" style:list-style-name="L63"/>
    <style:style style:name="P71" style:family="paragraph" style:parent-style-name="Text_20_body" style:list-style-name="L64"/>
    <style:style style:name="P72" style:family="paragraph" style:parent-style-name="Text_20_body" style:list-style-name="L65"/>
    <style:style style:name="P73" style:family="paragraph" style:parent-style-name="Text_20_body" style:list-style-name="L66"/>
    <style:style style:name="P74" style:family="paragraph" style:parent-style-name="Text_20_body" style:list-style-name="L67"/>
    <style:style style:name="P75" style:family="paragraph" style:parent-style-name="Text_20_body" style:list-style-name="L68"/>
    <style:style style:name="P76" style:family="paragraph" style:parent-style-name="Text_20_body" style:list-style-name="L69"/>
    <style:style style:name="P77" style:family="paragraph" style:parent-style-name="Text_20_body" style:list-style-name="L70"/>
    <style:style style:name="P78" style:family="paragraph" style:parent-style-name="Text_20_body" style:list-style-name="L71"/>
    <style:style style:name="P79" style:family="paragraph" style:parent-style-name="Preformatted_20_Text">
      <style:paragraph-properties fo:margin-top="0in" fo:margin-bottom="0.0972in" style:contextual-spacing="false" fo:line-height="115%"/>
      <style:text-properties officeooo:paragraph-rsid="0021eeba"/>
    </style:style>
    <style:style style:name="P80" style:family="paragraph" style:parent-style-name="Text_20_body" style:list-style-name="L72"/>
    <style:style style:name="P81" style:family="paragraph" style:parent-style-name="Text_20_body" style:list-style-name="L73"/>
    <style:style style:name="P82" style:family="paragraph" style:parent-style-name="Text_20_body" style:list-style-name="L74"/>
    <style:style style:name="P83" style:family="paragraph" style:parent-style-name="Text_20_body" style:list-style-name="L75"/>
    <style:style style:name="P84" style:family="paragraph" style:parent-style-name="Text_20_body" style:list-style-name="L76"/>
    <style:style style:name="P85" style:family="paragraph" style:parent-style-name="Text_20_body" style:list-style-name="L77"/>
    <style:style style:name="P86" style:family="paragraph" style:parent-style-name="Text_20_body" style:list-style-name="L78"/>
    <style:style style:name="P87" style:family="paragraph" style:parent-style-name="Preformatted_20_Text">
      <style:paragraph-properties fo:margin-top="0in" fo:margin-bottom="0.0972in" style:contextual-spacing="false" fo:line-height="115%"/>
      <style:text-properties officeooo:paragraph-rsid="0022fd53"/>
    </style:style>
    <style:style style:name="P88" style:family="paragraph" style:parent-style-name="Text_20_body" style:list-style-name="L79"/>
    <style:style style:name="P89" style:family="paragraph" style:parent-style-name="Text_20_body" style:list-style-name="L80"/>
    <style:style style:name="P90" style:family="paragraph" style:parent-style-name="Text_20_body" style:list-style-name="L81"/>
    <style:style style:name="T1" style:family="text">
      <style:text-properties officeooo:rsid="001c4c2e"/>
    </style:style>
    <style:style style:name="T2" style:family="text">
      <style:text-properties officeooo:rsid="0021eeb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avaScript Complete Learning &amp; Notes Roadmap <text:span text:style-name="T1">by __A N Shuvo</text:span></text:h>
      <text:h text:style-name="Heading_20_2" text:outline-level="2">Section 1: JavaScript Introduction &amp; Foundation</text:h>
      <text:h text:style-name="Heading_20_3" text:outline-level="3">Step 1: What is JavaScript?</text:h>
      <text:list text:style-name="L1">
        <text:list-item>
          <text:p text:style-name="P2">JavaScript কী?</text:p>
        </text:list-item>
        <text:list-item>
          <text:p text:style-name="P2">JavaScript কেন তৈরি করা হয়েছিল?</text:p>
        </text:list-item>
        <text:list-item>
          <text:p text:style-name="P2">JavaScript এর ইতিহাস</text:p>
        </text:list-item>
        <text:list-item>
          <text:p text:style-name="P2">Brendan Eich কে?</text:p>
        </text:list-item>
        <text:list-item>
          <text:p text:style-name="P2">ECMAScript কি?</text:p>
        </text:list-item>
        <text:list-item>
          <text:p text:style-name="P2">JavaScript vs ECMAScript</text:p>
        </text:list-item>
        <text:list-item>
          <text:p text:style-name="P2">JavaScript এর Evolution</text:p>
        </text:list-item>
      </text:list>
      <text:p text:style-name="Horizontal_20_Line"/>
      <text:h text:style-name="Heading_20_3" text:outline-level="3">Step 2: Why Learn JavaScript?</text:h>
      <text:list text:style-name="L2">
        <text:list-item>
          <text:p text:style-name="P3">JavaScript শেখার গুরুত্ব</text:p>
        </text:list-item>
        <text:list-item>
          <text:p text:style-name="P3">বর্তমান মার্কেটে চাহিদা</text:p>
        </text:list-item>
        <text:list-item>
          <text:p text:style-name="P3">Full Stack Development এ ভূমিকা</text:p>
        </text:list-item>
        <text:list-item>
          <text:p text:style-name="P3">Career Opportunities</text:p>
        </text:list-item>
        <text:list-item>
          <text:p text:style-name="P3">Future Scope</text:p>
        </text:list-item>
      </text:list>
      <text:p text:style-name="Horizontal_20_Line"/>
      <text:h text:style-name="Heading_20_3" text:outline-level="3">Step 3: Where JavaScript is Used?</text:h>
      <text:list text:style-name="L3">
        <text:list-item>
          <text:p text:style-name="P4">Browser Development</text:p>
        </text:list-item>
        <text:list-item>
          <text:p text:style-name="P4">Web Applications</text:p>
        </text:list-item>
        <text:list-item>
          <text:p text:style-name="P4">Mobile Applications</text:p>
        </text:list-item>
        <text:list-item>
          <text:p text:style-name="P4">Desktop Applications</text:p>
        </text:list-item>
        <text:list-item>
          <text:p text:style-name="P4">Backend Development</text:p>
        </text:list-item>
        <text:list-item>
          <text:p text:style-name="P4">Game Development</text:p>
        </text:list-item>
        <text:list-item>
          <text:p text:style-name="P4">AI &amp; Machine Learning</text:p>
        </text:list-item>
        <text:list-item>
          <text:p text:style-name="P4"><text:soft-page-break/>IoT Devices</text:p>
        </text:list-item>
      </text:list>
      <text:p text:style-name="Horizontal_20_Line"/>
      <text:h text:style-name="Heading_20_3" text:outline-level="3">Step 4: JavaScript Ecosystem Overview</text:h>
      <text:list text:style-name="L4">
        <text:list-item>
          <text:p text:style-name="P5">JavaScript Ecosystem কী?</text:p>
        </text:list-item>
        <text:list-item>
          <text:p text:style-name="P5">Runtime</text:p>
        </text:list-item>
        <text:list-item>
          <text:p text:style-name="P5">Framework</text:p>
        </text:list-item>
        <text:list-item>
          <text:p text:style-name="P5">Library</text:p>
        </text:list-item>
        <text:list-item>
          <text:p text:style-name="P5">Package Manager</text:p>
        </text:list-item>
        <text:list-item>
          <text:p text:style-name="P5">Build Tools</text:p>
        </text:list-item>
      </text:list>
      <text:p text:style-name="Horizontal_20_Line"/>
      <text:h text:style-name="Heading_20_2" text:outline-level="2">Section 2: Setting Up JavaScript Environment</text:h>
      <text:h text:style-name="Heading_20_3" text:outline-level="3">Step 5: JavaScript Runtime Environment</text:h>
      <text:list text:style-name="L5">
        <text:list-item>
          <text:p text:style-name="P6">Browser Engine</text:p>
        </text:list-item>
        <text:list-item>
          <text:p text:style-name="P6">JavaScript Engine</text:p>
        </text:list-item>
        <text:list-item>
          <text:p text:style-name="P6">V8 Engine</text:p>
        </text:list-item>
        <text:list-item>
          <text:p text:style-name="P6">SpiderMonkey</text:p>
        </text:list-item>
        <text:list-item>
          <text:p text:style-name="P6">JavaScript Execution Process</text:p>
        </text:list-item>
      </text:list>
      <text:p text:style-name="Horizontal_20_Line"/>
      <text:h text:style-name="Heading_20_3" text:outline-level="3">Step 6: Installing Development Tools</text:h>
      <text:list text:style-name="L6">
        <text:list-item>
          <text:p text:style-name="P7">VS Code</text:p>
        </text:list-item>
        <text:list-item>
          <text:p text:style-name="P7">Browser DevTools</text:p>
        </text:list-item>
        <text:list-item>
          <text:p text:style-name="P7">Node.js</text:p>
        </text:list-item>
        <text:list-item>
          <text:p text:style-name="P7">npm</text:p>
        </text:list-item>
        <text:list-item>
          <text:p text:style-name="P7">Git</text:p>
        </text:list-item>
        <text:list-item>
          <text:p text:style-name="P7">GitHub</text:p>
        </text:list-item>
      </text:list>
      <text:p text:style-name="Horizontal_20_Line"/>
      <text:h text:style-name="Heading_20_3" text:outline-level="3">Step 7: Running JavaScript</text:h>
      <text:list text:style-name="L7">
        <text:list-item>
          <text:p text:style-name="P8">Internal Script</text:p>
        </text:list-item>
        <text:list-item>
          <text:p text:style-name="P8"><text:soft-page-break/>External Script</text:p>
        </text:list-item>
        <text:list-item>
          <text:p text:style-name="P8">Browser Console</text:p>
        </text:list-item>
        <text:list-item>
          <text:p text:style-name="P8">Node.js Execution</text:p>
        </text:list-item>
      </text:list>
      <text:p text:style-name="Horizontal_20_Line"/>
      <text:h text:style-name="Heading_20_2" text:outline-level="2">Section 3: JavaScript Fundamentals</text:h>
      <text:h text:style-name="Heading_20_3" text:outline-level="3">Step 8: Syntax Basics</text:h>
      <text:h text:style-name="Heading_20_3" text:outline-level="3">Step 9: Variables</text:h>
      <text:h text:style-name="Heading_20_3" text:outline-level="3">Step 10: Data Types</text:h>
      <text:h text:style-name="Heading_20_3" text:outline-level="3">Step 11: Operators</text:h>
      <text:h text:style-name="Heading_20_3" text:outline-level="3">Step 12: Type Conversion</text:h>
      <text:h text:style-name="Heading_20_3" text:outline-level="3">Step 13: User Input &amp; Output</text:h>
      <text:h text:style-name="Heading_20_3" text:outline-level="3">Step 14: Comments</text:h>
      <text:p text:style-name="Horizontal_20_Line"/>
      <text:h text:style-name="Heading_20_2" text:outline-level="2">Section 4: Control Flow</text:h>
      <text:h text:style-name="Heading_20_3" text:outline-level="3">Step 15: Conditional Statements</text:h>
      <text:list text:style-name="L8">
        <text:list-item>
          <text:p text:style-name="P9">if</text:p>
        </text:list-item>
        <text:list-item>
          <text:p text:style-name="P9">else</text:p>
        </text:list-item>
        <text:list-item>
          <text:p text:style-name="P9">else if</text:p>
        </text:list-item>
        <text:list-item>
          <text:p text:style-name="P9">switch</text:p>
        </text:list-item>
      </text:list>
      <text:h text:style-name="Heading_20_3" text:outline-level="3">Step 16: Loops</text:h>
      <text:list text:style-name="L9">
        <text:list-item>
          <text:p text:style-name="P10">for</text:p>
        </text:list-item>
        <text:list-item>
          <text:p text:style-name="P10">while</text:p>
        </text:list-item>
        <text:list-item>
          <text:p text:style-name="P10">do while</text:p>
        </text:list-item>
        <text:list-item>
          <text:p text:style-name="P10">for...in</text:p>
        </text:list-item>
        <text:list-item>
          <text:p text:style-name="P10">for...of</text:p>
        </text:list-item>
      </text:list>
      <text:h text:style-name="Heading_20_3" text:outline-level="3"><text:soft-page-break/>Step 17: Break &amp; Continue</text:h>
      <text:p text:style-name="Horizontal_20_Line"/>
      <text:h text:style-name="Heading_20_2" text:outline-level="2">Section 5: Functions</text:h>
      <text:h text:style-name="Heading_20_3" text:outline-level="3">Step 18: Functions Introduction</text:h>
      <text:h text:style-name="Heading_20_3" text:outline-level="3">Step 19: Function Parameters</text:h>
      <text:h text:style-name="Heading_20_3" text:outline-level="3">Step 20: Return Values</text:h>
      <text:h text:style-name="Heading_20_3" text:outline-level="3">Step 21: Arrow Functions</text:h>
      <text:h text:style-name="Heading_20_3" text:outline-level="3">Step 22: Callback Functions</text:h>
      <text:h text:style-name="Heading_20_3" text:outline-level="3">Step 23: Higher Order Functions</text:h>
      <text:h text:style-name="Heading_20_3" text:outline-level="3">Step 24: Closures</text:h>
      <text:h text:style-name="Heading_20_3" text:outline-level="3">Step 25: Scope</text:h>
      <text:p text:style-name="Horizontal_20_Line"/>
      <text:h text:style-name="Heading_20_2" text:outline-level="2">Section 6: Objects &amp; OOP</text:h>
      <text:h text:style-name="Heading_20_3" text:outline-level="3">Step 26: Objects</text:h>
      <text:h text:style-name="Heading_20_3" text:outline-level="3">Step 27: Object Methods</text:h>
      <text:h text:style-name="Heading_20_3" text:outline-level="3">Step 28: Object Destructuring</text:h>
      <text:h text:style-name="Heading_20_3" text:outline-level="3">Step 29: Classes</text:h>
      <text:h text:style-name="Heading_20_3" text:outline-level="3">Step 30: Constructor</text:h>
      <text:h text:style-name="Heading_20_3" text:outline-level="3">Step 31: Inheritance</text:h>
      <text:h text:style-name="Heading_20_3" text:outline-level="3">Step 32: Encapsulation</text:h>
      <text:h text:style-name="Heading_20_3" text:outline-level="3">Step 33: Polymorphism</text:h>
      <text:h text:style-name="Heading_20_3" text:outline-level="3">Step 34: Prototype</text:h>
      <text:p text:style-name="Horizontal_20_Line"/>
      <text:h text:style-name="Heading_20_2" text:outline-level="2"><text:soft-page-break/>Section 7: Arrays</text:h>
      <text:h text:style-name="Heading_20_3" text:outline-level="3">Step 35: Arrays Basics</text:h>
      <text:h text:style-name="Heading_20_3" text:outline-level="3">Step 36: Array Methods</text:h>
      <text:list text:style-name="L10">
        <text:list-item>
          <text:p text:style-name="P11">push</text:p>
        </text:list-item>
        <text:list-item>
          <text:p text:style-name="P11">pop</text:p>
        </text:list-item>
        <text:list-item>
          <text:p text:style-name="P11">shift</text:p>
        </text:list-item>
        <text:list-item>
          <text:p text:style-name="P11">unshift</text:p>
        </text:list-item>
      </text:list>
      <text:h text:style-name="Heading_20_3" text:outline-level="3">Step 37: Advanced Array Methods</text:h>
      <text:list text:style-name="L11">
        <text:list-item>
          <text:p text:style-name="P12">map</text:p>
        </text:list-item>
        <text:list-item>
          <text:p text:style-name="P12">filter</text:p>
        </text:list-item>
        <text:list-item>
          <text:p text:style-name="P12">reduce</text:p>
        </text:list-item>
        <text:list-item>
          <text:p text:style-name="P12">find</text:p>
        </text:list-item>
        <text:list-item>
          <text:p text:style-name="P12">some</text:p>
        </text:list-item>
        <text:list-item>
          <text:p text:style-name="P12">every</text:p>
        </text:list-item>
      </text:list>
      <text:p text:style-name="Horizontal_20_Line"/>
      <text:h text:style-name="Heading_20_2" text:outline-level="2">Section 8: DOM Manipulation</text:h>
      <text:h text:style-name="Heading_20_3" text:outline-level="3">Step 38: What is DOM?</text:h>
      <text:h text:style-name="Heading_20_3" text:outline-level="3">Step 39: Selecting Elements</text:h>
      <text:h text:style-name="Heading_20_3" text:outline-level="3">Step 40: Event Handling</text:h>
      <text:h text:style-name="Heading_20_3" text:outline-level="3">Step 41: Form Validation</text:h>
      <text:h text:style-name="Heading_20_3" text:outline-level="3">Step 42: Dynamic UI Updates</text:h>
      <text:p text:style-name="Horizontal_20_Line"/>
      <text:h text:style-name="Heading_20_2" text:outline-level="2"><text:soft-page-break/>Section 9: Modern JavaScript (ES6+)</text:h>
      <text:h text:style-name="Heading_20_3" text:outline-level="3">Step 43: let &amp; const</text:h>
      <text:h text:style-name="Heading_20_3" text:outline-level="3">Step 44: Template Literals</text:h>
      <text:h text:style-name="Heading_20_3" text:outline-level="3">Step 45: Destructuring</text:h>
      <text:h text:style-name="Heading_20_3" text:outline-level="3">Step 46: Spread Operator</text:h>
      <text:h text:style-name="Heading_20_3" text:outline-level="3">Step 47: Rest Operator</text:h>
      <text:h text:style-name="Heading_20_3" text:outline-level="3">Step 48: Modules</text:h>
      <text:h text:style-name="Heading_20_3" text:outline-level="3">Step 49: Optional Chaining</text:h>
      <text:h text:style-name="Heading_20_3" text:outline-level="3">Step 50: Nullish Coalescing</text:h>
      <text:p text:style-name="Horizontal_20_Line"/>
      <text:h text:style-name="Heading_20_2" text:outline-level="2">Section 10: Asynchronous JavaScript</text:h>
      <text:h text:style-name="Heading_20_3" text:outline-level="3">Step 51: Synchronous vs Asynchronous</text:h>
      <text:h text:style-name="Heading_20_3" text:outline-level="3">Step 52: Callbacks</text:h>
      <text:h text:style-name="Heading_20_3" text:outline-level="3">Step 53: Promises</text:h>
      <text:h text:style-name="Heading_20_3" text:outline-level="3">Step 54: Async/Await</text:h>
      <text:h text:style-name="Heading_20_3" text:outline-level="3">Step 55: Fetch API</text:h>
      <text:h text:style-name="Heading_20_3" text:outline-level="3">Step 56: Error Handling</text:h>
      <text:p text:style-name="Horizontal_20_Line"/>
      <text:h text:style-name="Heading_20_2" text:outline-level="2"><text:soft-page-break/>Section 11: Browser APIs</text:h>
      <text:h text:style-name="Heading_20_3" text:outline-level="3">Step 57: Local Storage</text:h>
      <text:h text:style-name="Heading_20_3" text:outline-level="3">Step 58: Session Storage</text:h>
      <text:h text:style-name="Heading_20_3" text:outline-level="3">Step 59: Cookies</text:h>
      <text:h text:style-name="Heading_20_3" text:outline-level="3">Step 60: Geolocation API</text:h>
      <text:h text:style-name="Heading_20_3" text:outline-level="3">Step 61: Web APIs</text:h>
      <text:p text:style-name="Horizontal_20_Line"/>
      <text:h text:style-name="Heading_20_2" text:outline-level="2">Section 12: JavaScript Backend Development</text:h>
      <text:h text:style-name="Heading_20_3" text:outline-level="3">Step 62: What is Node.js?</text:h>
      <text:h text:style-name="Heading_20_3" text:outline-level="3">Step 63: Why Node.js?</text:h>
      <text:h text:style-name="Heading_20_3" text:outline-level="3">Step 64: npm</text:h>
      <text:h text:style-name="Heading_20_3" text:outline-level="3">Step 65: Express.js</text:h>
      <text:h text:style-name="Heading_20_3" text:outline-level="3">Step 66: REST API</text:h>
      <text:h text:style-name="Heading_20_3" text:outline-level="3">Step 67: Authentication</text:h>
      <text:h text:style-name="Heading_20_3" text:outline-level="3">Step 68: Database Connection</text:h>
      <text:h text:style-name="Heading_20_3" text:outline-level="3">Step 69: JWT Authentication</text:h>
      <text:p text:style-name="Horizontal_20_Line"/>
      <text:h text:style-name="Heading_20_2" text:outline-level="2"><text:soft-page-break/>Section 13: JavaScript Frontend Development</text:h>
      <text:h text:style-name="Heading_20_3" text:outline-level="3">Step 70: Vanilla JavaScript</text:h>
      <text:h text:style-name="Heading_20_3" text:outline-level="3">Step 71: SPA (Single Page Application)</text:h>
      <text:h text:style-name="Heading_20_3" text:outline-level="3">Step 72: React.js</text:h>
      <text:h text:style-name="Heading_20_3" text:outline-level="3">Step 73: Angular</text:h>
      <text:h text:style-name="Heading_20_3" text:outline-level="3">Step 74: Vue.js</text:h>
      <text:h text:style-name="Heading_20_3" text:outline-level="3">Step 75: Next.js</text:h>
      <text:p text:style-name="Horizontal_20_Line"/>
      <text:h text:style-name="Heading_20_2" text:outline-level="2">Section 14: JavaScript Tools &amp; Build Systems</text:h>
      <text:h text:style-name="Heading_20_3" text:outline-level="3">Step 76: Babel</text:h>
      <text:h text:style-name="Heading_20_3" text:outline-level="3">Step 77: Webpack</text:h>
      <text:h text:style-name="Heading_20_3" text:outline-level="3">Step 78: Vite</text:h>
      <text:h text:style-name="Heading_20_3" text:outline-level="3">Step 79: ESLint</text:h>
      <text:h text:style-name="Heading_20_3" text:outline-level="3">Step 80: Prettier</text:h>
      <text:p text:style-name="Horizontal_20_Line"/>
      <text:h text:style-name="Heading_20_2" text:outline-level="2">Section 15: JavaScript Testing</text:h>
      <text:h text:style-name="Heading_20_3" text:outline-level="3">Step 81: Unit Testing</text:h>
      <text:h text:style-name="Heading_20_3" text:outline-level="3">Step 82: Jest</text:h>
      <text:h text:style-name="Heading_20_3" text:outline-level="3">Step 83: Vitest</text:h>
      <text:h text:style-name="Heading_20_3" text:outline-level="3">Step 84: Cypress</text:h>
      <text:p text:style-name="Horizontal_20_Line"/>
      <text:h text:style-name="Heading_20_2" text:outline-level="2"><text:soft-page-break/>Section 16: Advanced JavaScript</text:h>
      <text:h text:style-name="Heading_20_3" text:outline-level="3">Step 85: Event Loop</text:h>
      <text:h text:style-name="Heading_20_3" text:outline-level="3">Step 86: Call Stack</text:h>
      <text:h text:style-name="Heading_20_3" text:outline-level="3">Step 87: Memory Management</text:h>
      <text:h text:style-name="Heading_20_3" text:outline-level="3">Step 88: Execution Context</text:h>
      <text:h text:style-name="Heading_20_3" text:outline-level="3">Step 89: Hoisting</text:h>
      <text:h text:style-name="Heading_20_3" text:outline-level="3">Step 90: Debouncing</text:h>
      <text:h text:style-name="Heading_20_3" text:outline-level="3">Step 91: Throttling</text:h>
      <text:h text:style-name="Heading_20_3" text:outline-level="3">Step 92: Design Patterns</text:h>
      <text:p text:style-name="Horizontal_20_Line"/>
      <text:h text:style-name="Heading_20_2" text:outline-level="2">Section 17: TypeScript</text:h>
      <text:h text:style-name="Heading_20_3" text:outline-level="3">Step 93: What is TypeScript?</text:h>
      <text:h text:style-name="Heading_20_3" text:outline-level="3">Step 94: Why TypeScript?</text:h>
      <text:h text:style-name="Heading_20_3" text:outline-level="3">Step 95: Types</text:h>
      <text:h text:style-name="Heading_20_3" text:outline-level="3">Step 96: Interfaces</text:h>
      <text:h text:style-name="Heading_20_3" text:outline-level="3">Step 97: Generics</text:h>
      <text:h text:style-name="Heading_20_3" text:outline-level="3">Step 98: TypeScript with React</text:h>
      <text:h text:style-name="Heading_20_3" text:outline-level="3">Step 99: TypeScript with Node.js</text:h>
      <text:p text:style-name="Horizontal_20_Line"/>
      <text:h text:style-name="Heading_20_2" text:outline-level="2">Section 18: JavaScript Career Roadmap</text:h>
      <text:h text:style-name="Heading_20_3" text:outline-level="3">Step 100: JavaScript Developer Roadmap</text:h>
      <text:list text:style-name="L12">
        <text:list-item>
          <text:p text:style-name="P13">Frontend Developer Path</text:p>
        </text:list-item>
        <text:list-item>
          <text:p text:style-name="P13">Backend Developer Path</text:p>
        </text:list-item>
        <text:list-item>
          <text:p text:style-name="P13">Full Stack Developer Path</text:p>
        </text:list-item>
        <text:list-item>
          <text:p text:style-name="P13"><text:soft-page-break/>MERN Stack</text:p>
        </text:list-item>
        <text:list-item>
          <text:p text:style-name="P13">MEAN Stack</text:p>
        </text:list-item>
        <text:list-item>
          <text:p text:style-name="P13">Enterprise Development</text:p>
        </text:list-item>
        <text:list-item>
          <text:p text:style-name="P13">Interview Preparation</text:p>
        </text:list-item>
      </text:list>
      <text:p text:style-name="Horizontal_20_Line"/>
      <text:h text:style-name="Heading_20_3" text:outline-level="3">শেখার ক্রম (আমার সুপারিশ)</text:h>
      <text:p text:style-name="Text_20_body">১. Step 1 → Step 7 (Foundation)<text:line-break/>২. Step 8 → Step 25 (Core JavaScript)<text:line-break/>৩. Step 26 → Step 37 (Objects &amp; Arrays)<text:line-break/>৪. Step 38 → Step 56 (DOM + Async)<text:line-break/>৫. Step 62 → Step 69 (Node.js Backend)<text:line-break/>৬. Step 70 → Step 75 (Frontend Frameworks)<text:line-break/>৭. Step 76 → Step 100 (Advanced &amp; Career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4" text:outline-level="2"><text:soft-page-break/>Section 1: JavaScript Intr<text:span text:style-name="T2">o.</text:span> &amp; Foundation</text:h>
      <text:h text:style-name="P15" text:outline-level="1">Step 1: What is JavaScript?</text:h>
      <text:p text:style-name="P16"/>
      <text:h text:style-name="P15" text:outline-level="1">1. JavaScript কী?</text:h>
      <text:p text:style-name="Text_20_body"><text:span text:style-name="Strong_20_Emphasis">JavaScript (JS)</text:span> হলো একটি <text:span text:style-name="Strong_20_Emphasis">High-Level, Interpreted, Dynamic Programming Language</text:span> যা মূলত ওয়েব পেজকে Interactive এবং Dynamic করার জন্য তৈরি করা হয়েছিল।</text:p>
      <text:p text:style-name="Text_20_body">HTML ওয়েব পেজের Structure তৈরি করে, CSS Design ও Styling করে, আর JavaScript ওয়েব পেজে Logic ও Interactivity যোগ করে।</text:p>
      <text:h text:style-name="P17" text:outline-level="3">উদাহরণ</text:h>
      <text:p text:style-name="Text_20_body">HTML:</text:p>
      <text:p text:style-name="P18"><text:span text:style-name="Source_20_Text">&lt;button&gt;Click Me&lt;/button&gt;</text:span></text:p>
      <text:p text:style-name="Text_20_body">JavaScript:</text:p>
      <text:p text:style-name="P18"><text:span text:style-name="Source_20_Text">document.querySelector("button")</text:span></text:p>
      <text:p text:style-name="P18"><text:span text:style-name="Source_20_Text"><text:s text:c="8"/>.addEventListener("click", function () {</text:span></text:p>
      <text:p text:style-name="P18"><text:span text:style-name="Source_20_Text"><text:s text:c="12"/>alert("Hello World!");</text:span></text:p>
      <text:p text:style-name="P18"><text:span text:style-name="Source_20_Text"><text:s text:c="8"/>});</text:span></text:p>
      <text:p text:style-name="Text_20_body">এখানে JavaScript ব্যবহার করে Button-এ Click করলে একটি Message দেখানো হচ্ছে।</text:p>
      <text:p text:style-name="P16"/>
      <text:h text:style-name="P19" text:outline-level="2">JavaScript এর প্রধান বৈশিষ্ট্য</text:h>
      <text:h text:style-name="P17" text:outline-level="3">1. Lightweight</text:h>
      <text:p text:style-name="Text_20_body">JavaScript চালানোর জন্য ভারী Runtime প্রয়োজন হয় না।</text:p>
      <text:h text:style-name="P17" text:outline-level="3">2. Dynamic</text:h>
      <text:p text:style-name="Text_20_body">Variable-এর Data Type আগে থেকে নির্ধারণ করতে হয় না।</text:p>
      <text:p text:style-name="P18"><text:span text:style-name="Source_20_Text">let data = "Hello";</text:span></text:p>
      <text:p text:style-name="P18"><text:span text:style-name="Source_20_Text">data = 100;</text:span></text:p>
      <text:h text:style-name="P17" text:outline-level="3">3. Cross Platform</text:h>
      <text:p text:style-name="Text_20_body">Windows, Linux, MacOS, Mobile এবং Browser-এ চলে।</text:p>
      <text:h text:style-name="P17" text:outline-level="3">4. Object-Oriented</text:h>
      <text:p text:style-name="Text_20_body">Object ও Class ব্যবহার করা যায়।</text:p>
      <text:h text:style-name="P17" text:outline-level="3"><text:soft-page-break/>5. Event Driven</text:h>
      <text:p text:style-name="Text_20_body">User-এর Action (Click, KeyPress, Mouse Move) অনুযায়ী কাজ করতে পারে।</text:p>
      <text:h text:style-name="P17" text:outline-level="3">6. Prototype Based</text:h>
      <text:p text:style-name="Text_20_body">JavaScript Prototype System ব্যবহার করে Inheritance Implement করে।</text:p>
      <text:p text:style-name="P16"/>
      <text:h text:style-name="P15" text:outline-level="1">2. JavaScript কেন তৈরি করা হয়েছিল?</text:h>
      <text:p text:style-name="Text_20_body">১৯৯০-এর দশকের শুরুতে Web Page ছিল Static।</text:p>
      <text:p text:style-name="Text_20_body">ব্যবহারকারী কোনো Button চাপলে বা Form Submit করলে সার্ভারে Request যেত এবং Server Response পাঠাত।</text:p>
      <text:p text:style-name="Text_20_body">ফলে:</text:p>
      <text:list text:style-name="L13">
        <text:list-item>
          <text:p text:style-name="P20">User Experience খারাপ ছিল</text:p>
        </text:list-item>
        <text:list-item>
          <text:p text:style-name="P20">Page বারবার Reload হতো</text:p>
        </text:list-item>
        <text:list-item>
          <text:p text:style-name="P20">Validation Server Side-এ করতে হতো</text:p>
        </text:list-item>
      </text:list>
      <text:p text:style-name="P16"/>
      <text:h text:style-name="P19" text:outline-level="2">সমস্যার সমাধান</text:h>
      <text:p text:style-name="Text_20_body">Netscape Browser চেয়েছিল Browser-এর মধ্যেই কিছু Logic চালাতে।</text:p>
      <text:p text:style-name="Text_20_body">তাদের প্রয়োজন ছিল:</text:p>
      <text:h text:style-name="P17" text:outline-level="3">Form Validation</text:h>
      <text:p text:style-name="P18"><text:span text:style-name="Source_20_Text">Email খালি আছে কি না?</text:span></text:p>
      <text:p text:style-name="P18"><text:span text:style-name="Source_20_Text">Password দেওয়া হয়েছে কি না?</text:span></text:p>
      <text:h text:style-name="P17" text:outline-level="3">User Interaction</text:h>
      <text:p text:style-name="P18"><text:span text:style-name="Source_20_Text">Button Click</text:span></text:p>
      <text:p text:style-name="P18"><text:span text:style-name="Source_20_Text">Dropdown Change</text:span></text:p>
      <text:p text:style-name="P18"><text:span text:style-name="Source_20_Text">Menu Animation</text:span></text:p>
      <text:h text:style-name="P17" text:outline-level="3">Dynamic Content</text:h>
      <text:p text:style-name="P18"><text:span text:style-name="Source_20_Text">সময় দেখানো</text:span></text:p>
      <text:p text:style-name="P18"><text:span text:style-name="Source_20_Text">স্লাইডার পরিবর্তন</text:span></text:p>
      <text:p text:style-name="P18"><text:span text:style-name="Source_20_Text">ছবি পরিবর্তন</text:span></text:p>
      <text:p text:style-name="Text_20_body">এই সমস্যাগুলোর সমাধানের জন্য JavaScript তৈরি করা হয়।</text:p>
      <text:p text:style-name="P16"/>
      <text:h text:style-name="P15" text:outline-level="1"><text:soft-page-break/>3. JavaScript এর ইতিহাস</text:h>
      <text:h text:style-name="P19" text:outline-level="2">1995</text:h>
      <text:p text:style-name="Text_20_body">Netscape Communications নতুন Browser তৈরি করছিল:</text:p>
      <text:p text:style-name="Text_20_body"><text:a xlink:type="simple" xlink:href="https://chatgpt.com/c/6a1d6b91-5c78-8320-a9eb-56f2731345da" text:style-name="Internet_20_link" text:visited-style-name="Visited_20_Internet_20_Link">Netscape Navigator</text:a></text:p>
      <text:p text:style-name="Text_20_body">তারা Browser-এর জন্য একটি Scripting Language চাইল।</text:p>
      <text:p text:style-name="P16"/>
      <text:h text:style-name="P19" text:outline-level="2">Brendan Eich-এর দায়িত্ব</text:h>
      <text:p text:style-name="Text_20_body">Netscape মাত্র ১০ দিনের মধ্যে একটি Language তৈরির দায়িত্ব দেয় Brendan Eich-কে।</text:p>
      <text:p text:style-name="Text_20_body">অবিশ্বাস্য হলেও সত্যি—</text:p>
      <text:h text:style-name="P17" text:outline-level="3">মাত্র ১০ দিনে JavaScript-এর প্রথম Version তৈরি হয়।</text:h>
      <text:p text:style-name="P16"/>
      <text:h text:style-name="P19" text:outline-level="2">প্রথম নাম</text:h>
      <text:p text:style-name="Text_20_body">Language-এর নাম ছিল:</text:p>
      <text:p text:style-name="P18"><text:span text:style-name="Source_20_Text">Mocha</text:span></text:p>
      <text:p text:style-name="Text_20_body">পরে নাম পরিবর্তন করে করা হয়:</text:p>
      <text:p text:style-name="P18"><text:span text:style-name="Source_20_Text">LiveScript</text:span></text:p>
      <text:p text:style-name="Text_20_body">আরও পরে Marketing কারণে নাম হয়:</text:p>
      <text:p text:style-name="P18"><text:span text:style-name="Source_20_Text">JavaScript</text:span></text:p>
      <text:p text:style-name="P16"/>
      <text:h text:style-name="P19" text:outline-level="2">JavaScript নাম কেন?</text:h>
      <text:p text:style-name="Text_20_body">সেই সময়</text:p>
      <text:p text:style-name="Text_20_body">Java</text:p>
      <text:p text:style-name="Text_20_body">খুব জনপ্রিয় ছিল।</text:p>
      <text:p text:style-name="Text_20_body">Marketing-এর সুবিধার জন্য Netscape Java-এর জনপ্রিয়তাকে কাজে লাগিয়ে নাম রাখে JavaScript।</text:p>
      <text:p text:style-name="P16"/>
      <text:h text:style-name="P19" text:outline-level="2">গুরুত্বপূর্ণ তথ্য</text:h>
      <text:p text:style-name="Text_20_body">JavaScript এবং Java সম্পূর্ণ ভিন্ন Technology।</text:p>
      <text:p text:style-name="Text_20_body">অনেক নতুন Developer মনে করে:</text:p>
      <text:p text:style-name="P18"><text:span text:style-name="Source_20_Text">JavaScript = Java</text:span></text:p>
      <text:p text:style-name="Text_20_body"><text:soft-page-break/>এটি ভুল ধারণা।</text:p>
      <text:p text:style-name="P16"/>
      <text:h text:style-name="P15" text:outline-level="1">4. Brendan Eich কে?</text:h>
      <text:p text:style-name="Text_20_body">Brendan Eich</text:p>
      <text:p text:style-name="Text_20_body">JavaScript-এর Creator।</text:p>
      <text:p text:style-name="P16"/>
      <text:h text:style-name="P19" text:outline-level="2">পরিচিতি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বিষয়</text:p>
            </table:table-cell>
            <table:table-cell table:style-name="Table1.A1" office:value-type="string">
              <text:p text:style-name="Table_20_Heading">তথ্য</text:p>
            </table:table-cell>
          </table:table-row>
        </table:table-header-rows>
        <table:table-row>
          <table:table-cell table:style-name="Table1.A1" office:value-type="string">
            <text:p text:style-name="Table_20_Contents">নাম</text:p>
          </table:table-cell>
          <table:table-cell table:style-name="Table1.A1" office:value-type="string">
            <text:p text:style-name="Table_20_Contents">Brendan Eich</text:p>
          </table:table-cell>
        </table:table-row>
        <table:table-row>
          <table:table-cell table:style-name="Table1.A1" office:value-type="string">
            <text:p text:style-name="Table_20_Contents">জন্ম</text:p>
          </table:table-cell>
          <table:table-cell table:style-name="Table1.A1" office:value-type="string">
            <text:p text:style-name="Table_20_Contents">1961</text:p>
          </table:table-cell>
        </table:table-row>
        <table:table-row>
          <table:table-cell table:style-name="Table1.A1" office:value-type="string">
            <text:p text:style-name="Table_20_Contents">পেশা</text:p>
          </table:table-cell>
          <table:table-cell table:style-name="Table1.A1" office:value-type="string">
            <text:p text:style-name="Table_20_Contents">Software Engineer</text:p>
          </table:table-cell>
        </table:table-row>
        <table:table-row>
          <table:table-cell table:style-name="Table1.A1" office:value-type="string">
            <text:p text:style-name="Table_20_Contents">বিখ্যাত কারণ</text:p>
          </table:table-cell>
          <table:table-cell table:style-name="Table1.A1" office:value-type="string">
            <text:p text:style-name="Table_20_Contents">JavaScript Creator</text:p>
          </table:table-cell>
        </table:table-row>
      </table:table>
      <text:p text:style-name="P16"/>
      <text:h text:style-name="P19" text:outline-level="2">তাঁর অবদান</text:h>
      <text:h text:style-name="P17" text:outline-level="3">JavaScript তৈরি</text:h>
      <text:p text:style-name="Text_20_body">১৯৯৫ সালে JavaScript তৈরি করেন।</text:p>
      <text:h text:style-name="P17" text:outline-level="3">Mozilla Project</text:h>
      <text:p text:style-name="Text_20_body">পরে Mozilla Project-এর গুরুত্বপূর্ণ অংশ হন।</text:p>
      <text:h text:style-name="P17" text:outline-level="3">Firefox</text:h>
      <text:p text:style-name="Text_20_body">Mozilla Firefox</text:p>
      <text:p text:style-name="Text_20_body">Browser Development-এ অবদান রাখেন।</text:p>
      <text:h text:style-name="P17" text:outline-level="3">Brave Browser</text:h>
      <text:p text:style-name="Text_20_body">বর্তমানে</text:p>
      <text:p text:style-name="Text_20_body"><text:a xlink:type="simple" xlink:href="https://brave.com/?utm_source=chatgpt.com" text:style-name="Internet_20_link" text:visited-style-name="Visited_20_Internet_20_Link">Brave Browser</text:a></text:p>
      <text:p text:style-name="Text_20_body">এর Co-Founder ও CEO।</text:p>
      <text:p text:style-name="P16"/>
      <text:h text:style-name="P15" text:outline-level="1">5. ECMAScript কি?</text:h>
      <text:p text:style-name="Text_20_body">JavaScript-এর Official Standard-এর নাম হলো ECMAScript।</text:p>
      <text:p text:style-name="P16"/>
      <text:h text:style-name="P19" text:outline-level="2"><text:soft-page-break/>কেন Standard প্রয়োজন হয়েছিল?</text:h>
      <text:p text:style-name="Text_20_body">১৯৯০-এর শেষ দিকে বিভিন্ন Browser নিজেদের মতো JavaScript Implement করতে শুরু করে।</text:p>
      <text:p text:style-name="Text_20_body">ফলে:</text:p>
      <text:p text:style-name="P18"><text:span text:style-name="Source_20_Text">এক Browser-এ Code চলে</text:span></text:p>
      <text:p text:style-name="P18"><text:span text:style-name="Source_20_Text">অন্য Browser-এ চলে না</text:span></text:p>
      <text:p text:style-name="Text_20_body">সমস্যা দেখা দেয়।</text:p>
      <text:p text:style-name="P16"/>
      <text:h text:style-name="P19" text:outline-level="2">সমাধান</text:h>
      <text:p text:style-name="Text_20_body">একটি Standard তৈরি করা হয়।</text:p>
      <text:p text:style-name="Text_20_body">এই Standard-এর নাম:</text:p>
      <text:h text:style-name="P17" text:outline-level="3">ECMAScript</text:h>
      <text:p text:style-name="P16"/>
      <text:h text:style-name="P19" text:outline-level="2">ECMAScript কে পরিচালনা করে?</text:h>
      <text:p text:style-name="Text_20_body">ECMA International</text:p>
      <text:p text:style-name="P16"/>
      <text:h text:style-name="P19" text:outline-level="2">সহজ ভাষায়</text:h>
      <text:p text:style-name="P18"><text:span text:style-name="Source_20_Text">ECMAScript = Specification</text:span></text:p>
      <text:p text:style-name="P18"><text:span text:style-name="Source_20_Text">JavaScript = Implementation</text:span></text:p>
      <text:p text:style-name="Text_20_body">অর্থাৎ:</text:p>
      <text:p text:style-name="Text_20_body">ECMAScript নিয়ম বানায়।</text:p>
      <text:p text:style-name="Text_20_body">JavaScript সেই নিয়ম অনুসরণ করে।</text:p>
      <text:p text:style-name="P16"/>
      <text:h text:style-name="P15" text:outline-level="1">6. JavaScript vs ECMAScript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JavaScript</text:p>
            </table:table-cell>
            <table:table-cell table:style-name="Table2.A1" office:value-type="string">
              <text:p text:style-name="Table_20_Heading">ECMAScript</text:p>
            </table:table-cell>
          </table:table-row>
        </table:table-header-rows>
        <table:table-row>
          <table:table-cell table:style-name="Table2.A1" office:value-type="string">
            <text:p text:style-name="Table_20_Contents">Programming Language</text:p>
          </table:table-cell>
          <table:table-cell table:style-name="Table2.A1" office:value-type="string">
            <text:p text:style-name="Table_20_Contents">Standard</text:p>
          </table:table-cell>
        </table:table-row>
        <table:table-row>
          <table:table-cell table:style-name="Table2.A1" office:value-type="string">
            <text:p text:style-name="Table_20_Contents">Browser-এ চলে</text:p>
          </table:table-cell>
          <table:table-cell table:style-name="Table2.A1" office:value-type="string">
            <text:p text:style-name="Table_20_Contents">Specification</text:p>
          </table:table-cell>
        </table:table-row>
        <table:table-row>
          <table:table-cell table:style-name="Table2.A1" office:value-type="string">
            <text:p text:style-name="Table_20_Contents">Developer ব্যবহার করে</text:p>
          </table:table-cell>
          <table:table-cell table:style-name="Table2.A1" office:value-type="string">
            <text:p text:style-name="Table_20_Contents">Browser Vendor অনুসরণ করে</text:p>
          </table:table-cell>
        </table:table-row>
        <table:table-row>
          <table:table-cell table:style-name="Table2.A1" office:value-type="string">
            <text:p text:style-name="Table_20_Contents">Code লেখা হয়</text:p>
          </table:table-cell>
          <table:table-cell table:style-name="Table2.A1" office:value-type="string">
            <text:p text:style-name="Table_20_Contents">Rules Define করে</text:p>
          </table:table-cell>
        </table:table-row>
      </table:table>
      <text:p text:style-name="P16"/>
      <text:h text:style-name="P19" text:outline-level="2">উদাহরণ</text:h>
      <text:p text:style-name="Text_20_body">ECMAScript বলে:</text:p>
      <text:p text:style-name="P18"><text:soft-page-break/><text:span text:style-name="Source_20_Text">let</text:span></text:p>
      <text:p text:style-name="P18"><text:span text:style-name="Source_20_Text">const</text:span></text:p>
      <text:p text:style-name="P18"><text:span text:style-name="Source_20_Text">class</text:span></text:p>
      <text:p text:style-name="P18"><text:span text:style-name="Source_20_Text">arrow function</text:span></text:p>
      <text:p text:style-name="Text_20_body">থাকতে হবে।</text:p>
      <text:p text:style-name="Text_20_body">Browser:</text:p>
      <text:list text:style-name="L14">
        <text:list-item>
          <text:p text:style-name="P21">Chrome</text:p>
        </text:list-item>
        <text:list-item>
          <text:p text:style-name="P21">Firefox</text:p>
        </text:list-item>
        <text:list-item>
          <text:p text:style-name="P21">Edge</text:p>
        </text:list-item>
      </text:list>
      <text:p text:style-name="Text_20_body">এই Features Implement করে।</text:p>
      <text:p text:style-name="P16"/>
      <text:h text:style-name="P15" text:outline-level="1">7. JavaScript এর Evolution</text:h>
      <text:p text:style-name="P16"/>
      <text:h text:style-name="P19" text:outline-level="2">ES1 (1997)</text:h>
      <text:p text:style-name="Text_20_body">প্রথম Official Standard।</text:p>
      <text:p text:style-name="P16"/>
      <text:h text:style-name="P19" text:outline-level="2">ES2 (1998)</text:h>
      <text:p text:style-name="Text_20_body">ছোটখাটো Update।</text:p>
      <text:p text:style-name="P16"/>
      <text:h text:style-name="P19" text:outline-level="2">ES3 (1999)</text:h>
      <text:p text:style-name="Text_20_body">JavaScript জনপ্রিয় হতে শুরু করে।</text:p>
      <text:p text:style-name="Text_20_body">নতুন Feature:</text:p>
      <text:list text:style-name="L15">
        <text:list-item>
          <text:p text:style-name="P22">Regular Expression</text:p>
        </text:list-item>
        <text:list-item>
          <text:p text:style-name="P22">Exception Handling</text:p>
        </text:list-item>
      </text:list>
      <text:p text:style-name="P16"/>
      <text:h text:style-name="P19" text:outline-level="2">ES4</text:h>
      <text:p text:style-name="Text_20_body">কখনো Release হয়নি।</text:p>
      <text:p text:style-name="P16"/>
      <text:h text:style-name="P19" text:outline-level="2">ES5 (2009)</text:h>
      <text:p text:style-name="Text_20_body">খুব গুরুত্বপূর্ণ Version।</text:p>
      <text:p text:style-name="Text_20_body"><text:soft-page-break/>নতুন Feature:</text:p>
      <text:p text:style-name="P18"><text:span text:style-name="Source_20_Text">JSON</text:span></text:p>
      <text:p text:style-name="P18"><text:span text:style-name="Source_20_Text">strict mode</text:span></text:p>
      <text:p text:style-name="P18"><text:span text:style-name="Source_20_Text">array methods</text:span></text:p>
      <text:p text:style-name="P16"/>
      <text:h text:style-name="P19" text:outline-level="2">ES6 / ES2015</text:h>
      <text:p text:style-name="Text_20_body">JavaScript-এর সবচেয়ে বড় Update।</text:p>
      <text:p text:style-name="Text_20_body">নতুন Feature:</text:p>
      <text:p text:style-name="P18"><text:span text:style-name="Source_20_Text">let</text:span></text:p>
      <text:p text:style-name="P18"><text:span text:style-name="Source_20_Text">const</text:span></text:p>
      <text:p text:style-name="P18"><text:span text:style-name="Source_20_Text">class</text:span></text:p>
      <text:p text:style-name="P18"><text:span text:style-name="Source_20_Text">arrow function</text:span></text:p>
      <text:p text:style-name="P18"><text:span text:style-name="Source_20_Text">template literal</text:span></text:p>
      <text:p text:style-name="P18"><text:span text:style-name="Source_20_Text">modules</text:span></text:p>
      <text:p text:style-name="Text_20_body">উদাহরণ:</text:p>
      <text:p text:style-name="P18"><text:span text:style-name="Source_20_Text">const name = "Shuvo";</text:span></text:p>
      <text:p text:style-name="P18"/>
      <text:p text:style-name="P18"><text:span text:style-name="Source_20_Text">console.log(`Hello ${name}`);</text:span></text:p>
      <text:p text:style-name="P16"/>
      <text:h text:style-name="P19" text:outline-level="2">ES2016+</text:h>
      <text:p text:style-name="Text_20_body">প্রতি বছর নতুন Feature যোগ হতে থাকে।</text:p>
      <text:h text:style-name="P17" text:outline-level="3">ES2016</text:h>
      <text:p text:style-name="P18"><text:span text:style-name="Source_20_Text">includes()</text:span></text:p>
      <text:h text:style-name="P17" text:outline-level="3">ES2017</text:h>
      <text:p text:style-name="P18"><text:span text:style-name="Source_20_Text">async</text:span></text:p>
      <text:p text:style-name="P18"><text:span text:style-name="Source_20_Text">await</text:span></text:p>
      <text:h text:style-name="P17" text:outline-level="3">ES2018</text:h>
      <text:p text:style-name="P18"><text:span text:style-name="Source_20_Text">Rest / Spread Improvements</text:span></text:p>
      <text:h text:style-name="P17" text:outline-level="3">ES2019</text:h>
      <text:p text:style-name="P18"><text:span text:style-name="Source_20_Text">flat()</text:span></text:p>
      <text:h text:style-name="P17" text:outline-level="3"><text:soft-page-break/>ES2020</text:h>
      <text:p text:style-name="P18"><text:span text:style-name="Source_20_Text">Optional Chaining</text:span></text:p>
      <text:p text:style-name="P18"><text:span text:style-name="Source_20_Text">Nullish Coalescing</text:span></text:p>
      <text:h text:style-name="P17" text:outline-level="3">ES2021+</text:h>
      <text:p text:style-name="Text_20_body">নতুন Feature নিয়মিত যুক্ত হচ্ছে।</text:p>
      <text:p text:style-name="P16"/>
      <text:h text:style-name="P15" text:outline-level="1">Summary</text:h>
      <text:p text:style-name="Text_20_body">এই অধ্যায় থেকে যা জানা হলো:</text:p>
      <text:p text:style-name="Text_20_body">✅ JavaScript হলো Web-এর Programming Language</text:p>
      <text:p text:style-name="Text_20_body">✅ Browser-কে Dynamic করার জন্য তৈরি হয়েছিল</text:p>
      <text:p text:style-name="Text_20_body">✅ Brendan Eich 1995 সালে মাত্র 10 দিনে এটি তৈরি করেন</text:p>
      <text:p text:style-name="Text_20_body">✅ JavaScript এবং Java আলাদা Language</text:p>
      <text:p text:style-name="Text_20_body">✅ ECMAScript হলো JavaScript-এর Standard</text:p>
      <text:p text:style-name="Text_20_body">✅ ES6 JavaScript-এর সবচেয়ে বড় Update</text:p>
      <text:p text:style-name="Text_20_body">✅ বর্তমানে Frontend, Backend, Mobile, Desktop, Cloud—সবখানেই JavaScript ব্যবহৃত হয়</text:p>
      <text:p text:style-name="P16"/>
      <text:h text:style-name="P17" text:outline-level="3">Interview Question</text:h>
      <text:list text:style-name="L16">
        <text:list-item>
          <text:p text:style-name="P23">JavaScript কী?</text:p>
        </text:list-item>
        <text:list-item>
          <text:p text:style-name="P23">JavaScript কেন তৈরি করা হয়েছিল?</text:p>
        </text:list-item>
        <text:list-item>
          <text:p text:style-name="P23">Brendan Eich কে?</text:p>
        </text:list-item>
        <text:list-item>
          <text:p text:style-name="P23">JavaScript এবং Java-এর মধ্যে পার্থক্য কী?</text:p>
        </text:list-item>
        <text:list-item>
          <text:p text:style-name="P23">ECMAScript কী?</text:p>
        </text:list-item>
        <text:list-item>
          <text:p text:style-name="P23">JavaScript vs ECMAScript ব্যাখ্যা করুন।</text:p>
        </text:list-item>
        <text:list-item>
          <text:p text:style-name="P23">ES6 কেন গুরুত্বপূর্ণ?</text:p>
        </text:list-item>
        <text:list-item>
          <text:p text:style-name="P23">JavaScript-এর Evolution সম্পর্কে বলুন।</text:p>
        </text:list-item>
      </text:list>
      <text:p text:style-name="Text_20_body"/>
      <text:p text:style-name="Text_20_body"/>
      <text:p text:style-name="Text_20_body"/>
      <text:p text:style-name="Text_20_body"/>
      <text:h text:style-name="P15" text:outline-level="1"><text:soft-page-break/>Step 2: Why Learn JavaScript?</text:h>
      <text:p text:style-name="P16"/>
      <text:h text:style-name="P15" text:outline-level="1">ভূমিকা</text:h>
      <text:p text:style-name="Text_20_body">বর্তমান সফটওয়্যার ডেভেলপমেন্ট জগতে JavaScript এমন একটি ভাষা যা একজন ডেভেলপারকে Frontend, Backend, Mobile App, Desktop App, API Development, Cloud Services এমনকি AI Application তৈরির সুযোগ দেয়।</text:p>
      <text:p text:style-name="Text_20_body">এক সময় JavaScript শুধুমাত্র Browser-এর জন্য ব্যবহৃত হতো। বর্তমানে এটি বিশ্বের অন্যতম জনপ্রিয় Programming Language এবং Full Stack Development-এর মূল ভিত্তিগুলোর একটি।</text:p>
      <text:p text:style-name="P16"/>
      <text:h text:style-name="P15" text:outline-level="1">1. JavaScript শেখার গুরুত্ব</text:h>
      <text:h text:style-name="P19" text:outline-level="2">JavaScript হলো Web-এর Language</text:h>
      <text:p text:style-name="Text_20_body">ওয়েব ডেভেলপমেন্টের তিনটি মূল স্তম্ভ হলো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Technology</text:p>
            </table:table-cell>
            <table:table-cell table:style-name="Table3.A1" office:value-type="string">
              <text:p text:style-name="Table_20_Heading">কাজ</text:p>
            </table:table-cell>
          </table:table-row>
        </table:table-header-rows>
        <table:table-row>
          <table:table-cell table:style-name="Table3.A1" office:value-type="string">
            <text:p text:style-name="Table_20_Contents">HTML</text:p>
          </table:table-cell>
          <table:table-cell table:style-name="Table3.A1" office:value-type="string">
            <text:p text:style-name="Table_20_Contents">Structure তৈরি করে</text:p>
          </table:table-cell>
        </table:table-row>
        <table:table-row>
          <table:table-cell table:style-name="Table3.A1" office:value-type="string">
            <text:p text:style-name="Table_20_Contents">CSS</text:p>
          </table:table-cell>
          <table:table-cell table:style-name="Table3.A1" office:value-type="string">
            <text:p text:style-name="Table_20_Contents">Design ও Styling করে</text:p>
          </table:table-cell>
        </table:table-row>
        <table:table-row>
          <table:table-cell table:style-name="Table3.A1" office:value-type="string">
            <text:p text:style-name="Table_20_Contents">JavaScript</text:p>
          </table:table-cell>
          <table:table-cell table:style-name="Table3.A1" office:value-type="string">
            <text:p text:style-name="Table_20_Contents">Logic ও Interaction পরিচালনা করে</text:p>
          </table:table-cell>
        </table:table-row>
      </table:table>
      <text:p text:style-name="Text_20_body">উদাহরণ:</text:p>
      <text:list text:style-name="L17">
        <text:list-item>
          <text:p text:style-name="P24">Button Click</text:p>
        </text:list-item>
        <text:list-item>
          <text:p text:style-name="P24">Form Validation</text:p>
        </text:list-item>
        <text:list-item>
          <text:p text:style-name="P24">Dynamic Content Loading</text:p>
        </text:list-item>
        <text:list-item>
          <text:p text:style-name="P24">API Call</text:p>
        </text:list-item>
        <text:list-item>
          <text:p text:style-name="P24">Animation</text:p>
        </text:list-item>
        <text:list-item>
          <text:p text:style-name="P24">Real-Time Update</text:p>
        </text:list-item>
      </text:list>
      <text:p text:style-name="Text_20_body">এসব JavaScript ছাড়া সম্ভব নয়।</text:p>
      <text:p text:style-name="P16"/>
      <text:h text:style-name="P19" text:outline-level="2">Browser Native Support</text:h>
      <text:p text:style-name="Text_20_body">JavaScript শেখার সবচেয়ে বড় সুবিধা হলো:</text:p>
      <text:p text:style-name="Text_20_body">প্রতিটি Browser JavaScript Support করে।</text:p>
      <text:p text:style-name="Text_20_body">যেমন:</text:p>
      <text:list text:style-name="L18">
        <text:list-item>
          <text:p text:style-name="P25">Google Chrome</text:p>
        </text:list-item>
        <text:list-item>
          <text:p text:style-name="P25"><text:soft-page-break/>Mozilla Firefox</text:p>
        </text:list-item>
        <text:list-item>
          <text:p text:style-name="P25">Microsoft Edge</text:p>
        </text:list-item>
        <text:list-item>
          <text:p text:style-name="P25">Safari</text:p>
        </text:list-item>
      </text:list>
      <text:p text:style-name="Text_20_body">কোনো অতিরিক্ত Installation ছাড়াই Browser-এ JavaScript Run করা যায়।</text:p>
      <text:p text:style-name="P16"/>
      <text:h text:style-name="P19" text:outline-level="2">Beginner Friendly</text:h>
      <text:p text:style-name="Text_20_body">অন্যান্য ভাষার তুলনায় JavaScript শেখা তুলনামূলক সহজ।</text:p>
      <text:p text:style-name="Text_20_body">উদাহরণ:</text:p>
      <text:p text:style-name="Text_20_body">C#:</text:p>
      <text:p text:style-name="P18"><text:span text:style-name="Source_20_Text">string name = "Shuvo";</text:span></text:p>
      <text:p text:style-name="Text_20_body">JavaScript:</text:p>
      <text:p text:style-name="P18"><text:span text:style-name="Source_20_Text">let name = "Shuvo";</text:span></text:p>
      <text:p text:style-name="Text_20_body">কম Syntax এবং দ্রুত Result দেখা যায়।</text:p>
      <text:p text:style-name="P16"/>
      <text:h text:style-name="P19" text:outline-level="2">দ্রুত Prototype তৈরি করা যায়</text:h>
      <text:p text:style-name="Text_20_body">Startup বা Software Company দ্রুত কোনো Idea Validate করতে চাইলে JavaScript একটি জনপ্রিয় পছন্দ।</text:p>
      <text:p text:style-name="Text_20_body">কারণ:</text:p>
      <text:list text:style-name="L19">
        <text:list-item>
          <text:p text:style-name="P26">Frontend</text:p>
        </text:list-item>
        <text:list-item>
          <text:p text:style-name="P26">Backend</text:p>
        </text:list-item>
        <text:list-item>
          <text:p text:style-name="P26">API</text:p>
        </text:list-item>
        <text:list-item>
          <text:p text:style-name="P26">Database Connection</text:p>
        </text:list-item>
      </text:list>
      <text:p text:style-name="Text_20_body">সব একই Language-এ করা সম্ভব।</text:p>
      <text:p text:style-name="P16"/>
      <text:h text:style-name="P15" text:outline-level="1">2. বর্তমান মার্কেটে JavaScript-এর চাহিদা</text:h>
      <text:h text:style-name="P19" text:outline-level="2">বিশ্বের সবচেয়ে জনপ্রিয় ভাষাগুলোর একটি</text:h>
      <text:p text:style-name="Text_20_body">বিগত কয়েক বছর ধরে JavaScript ধারাবাহিকভাবে বিশ্বের সবচেয়ে বেশি ব্যবহৃত Programming Language-গুলোর মধ্যে রয়েছে।</text:p>
      <text:p text:style-name="Text_20_body">কারণ:</text:p>
      <text:list text:style-name="L20">
        <text:list-item>
          <text:p text:style-name="P27">Web Development</text:p>
        </text:list-item>
        <text:list-item>
          <text:p text:style-name="P27"><text:soft-page-break/>SaaS Development</text:p>
        </text:list-item>
        <text:list-item>
          <text:p text:style-name="P27">Enterprise Software</text:p>
        </text:list-item>
        <text:list-item>
          <text:p text:style-name="P27">Startup Ecosystem</text:p>
        </text:list-item>
        <text:list-item>
          <text:p text:style-name="P27">Cloud Application</text:p>
        </text:list-item>
      </text:list>
      <text:p text:style-name="Text_20_body">সবখানেই JavaScript ব্যবহৃত হচ্ছে।</text:p>
      <text:p text:style-name="P16"/>
      <text:h text:style-name="P19" text:outline-level="2">চাকরির বাজারে চাহিদা</text:h>
      <text:p text:style-name="Text_20_body">বর্তমানে নিম্নোক্ত Job Position-গুলোতে JavaScript অন্যতম প্রধান Skill:</text:p>
      <text:h text:style-name="P17" text:outline-level="3">Frontend Developer</text:h>
      <text:p text:style-name="Text_20_body">ব্যবহৃত Technology:</text:p>
      <text:list text:style-name="L21">
        <text:list-item>
          <text:p text:style-name="P28">JavaScript</text:p>
        </text:list-item>
        <text:list-item>
          <text:p text:style-name="P28">TypeScript</text:p>
        </text:list-item>
        <text:list-item>
          <text:p text:style-name="P28">React</text:p>
        </text:list-item>
        <text:list-item>
          <text:p text:style-name="P28">Angular</text:p>
        </text:list-item>
        <text:list-item>
          <text:p text:style-name="P28">Vue</text:p>
        </text:list-item>
      </text:list>
      <text:p text:style-name="P16"/>
      <text:h text:style-name="P17" text:outline-level="3">Backend Developer</text:h>
      <text:p text:style-name="Text_20_body">ব্যবহৃত Technology:</text:p>
      <text:list text:style-name="L22">
        <text:list-item>
          <text:p text:style-name="P29">Node.js</text:p>
        </text:list-item>
        <text:list-item>
          <text:p text:style-name="P29">Express.js</text:p>
        </text:list-item>
      </text:list>
      <text:p text:style-name="P16"/>
      <text:h text:style-name="P17" text:outline-level="3">Full Stack Developer</text:h>
      <text:p text:style-name="Text_20_body">একই ব্যক্তি Frontend + Backend দুটোই তৈরি করে।</text:p>
      <text:p text:style-name="P16"/>
      <text:h text:style-name="P17" text:outline-level="3">Mobile App Developer</text:h>
      <text:p text:style-name="Text_20_body">ব্যবহৃত Technology:</text:p>
      <text:list text:style-name="L23">
        <text:list-item>
          <text:p text:style-name="P30">React Native</text:p>
        </text:list-item>
      </text:list>
      <text:p text:style-name="P16"/>
      <text:h text:style-name="P17" text:outline-level="3">Desktop Application Developer</text:h>
      <text:p text:style-name="Text_20_body">ব্যবহৃত Technology:</text:p>
      <text:list text:style-name="L24">
        <text:list-item>
          <text:p text:style-name="P31"><text:soft-page-break/>Electron</text:p>
        </text:list-item>
      </text:list>
      <text:p text:style-name="P16"/>
      <text:h text:style-name="P19" text:outline-level="2">Freelancing Market</text:h>
      <text:p text:style-name="Text_20_body">JavaScript Skill থাকলে কাজ পাওয়া যায়:</text:p>
      <text:list text:style-name="L25">
        <text:list-item>
          <text:p text:style-name="P32">Website Development</text:p>
        </text:list-item>
        <text:list-item>
          <text:p text:style-name="P32">Dashboard Development</text:p>
        </text:list-item>
        <text:list-item>
          <text:p text:style-name="P32">Admin Panel</text:p>
        </text:list-item>
        <text:list-item>
          <text:p text:style-name="P32">SaaS Product</text:p>
        </text:list-item>
        <text:list-item>
          <text:p text:style-name="P32">API Development</text:p>
        </text:list-item>
        <text:list-item>
          <text:p text:style-name="P32">Bug Fixing</text:p>
        </text:list-item>
      </text:list>
      <text:p text:style-name="P16"/>
      <text:h text:style-name="P15" text:outline-level="1">3. Full Stack Development-এ JavaScript-এর ভূমিকা</text:h>
      <text:p text:style-name="P16"/>
      <text:h text:style-name="P19" text:outline-level="2">Full Stack Development কী?</text:h>
      <text:p text:style-name="Text_20_body">একজন Full Stack Developer Frontend এবং Backend দুটোই তৈরি করতে পারেন।</text:p>
      <text:p text:style-name="P16"/>
      <text:h text:style-name="P19" text:outline-level="2">JavaScript-এর আগে</text:h>
      <text:p text:style-name="Text_20_body">Frontend:</text:p>
      <text:p text:style-name="P18"><text:span text:style-name="Source_20_Text">HTML</text:span></text:p>
      <text:p text:style-name="P18"><text:span text:style-name="Source_20_Text">CSS</text:span></text:p>
      <text:p text:style-name="P18"><text:span text:style-name="Source_20_Text">JavaScript</text:span></text:p>
      <text:p text:style-name="Text_20_body">Backend:</text:p>
      <text:p text:style-name="P18"><text:span text:style-name="Source_20_Text">PHP</text:span></text:p>
      <text:p text:style-name="P18"><text:span text:style-name="Source_20_Text">Java</text:span></text:p>
      <text:p text:style-name="P18"><text:span text:style-name="Source_20_Text">C#</text:span></text:p>
      <text:p text:style-name="P18"><text:span text:style-name="Source_20_Text">Python</text:span></text:p>
      <text:p text:style-name="Text_20_body">একজন Developer-কে দুই বা ততোধিক Language শিখতে হতো।</text:p>
      <text:p text:style-name="P16"/>
      <text:h text:style-name="P19" text:outline-level="2"><text:soft-page-break/>Node.js আসার পরে</text:h>
      <text:p text:style-name="Text_20_body">Frontend:</text:p>
      <text:p text:style-name="P18"><text:span text:style-name="Source_20_Text">JavaScript</text:span></text:p>
      <text:p text:style-name="Text_20_body">Backend:</text:p>
      <text:p text:style-name="P18"><text:span text:style-name="Source_20_Text">JavaScript</text:span></text:p>
      <text:p text:style-name="P18"><text:span text:style-name="Source_20_Text">(Node.js)</text:span></text:p>
      <text:p text:style-name="Text_20_body">একই Language দিয়ে পুরো Application তৈরি করা সম্ভব হলো।</text:p>
      <text:p text:style-name="P16"/>
      <text:h text:style-name="P19" text:outline-level="2">Full Stack JavaScript Architecture</text:h>
      <text:p text:style-name="P18"><text:span text:style-name="Source_20_Text">Frontend</text:span></text:p>
      <text:p text:style-name="P18"><text:span text:style-name="Source_20_Text"><text:s text:c="4"/>↓</text:span></text:p>
      <text:p text:style-name="P18"><text:span text:style-name="Source_20_Text">React / Angular</text:span></text:p>
      <text:p text:style-name="P18"/>
      <text:p text:style-name="P18"><text:span text:style-name="Source_20_Text">Backend</text:span></text:p>
      <text:p text:style-name="P18"><text:span text:style-name="Source_20_Text"><text:s text:c="4"/>↓</text:span></text:p>
      <text:p text:style-name="P18"><text:span text:style-name="Source_20_Text">Node.js + Express</text:span></text:p>
      <text:p text:style-name="P18"/>
      <text:p text:style-name="P18"><text:span text:style-name="Source_20_Text">Database</text:span></text:p>
      <text:p text:style-name="P18"><text:span text:style-name="Source_20_Text"><text:s text:c="4"/>↓</text:span></text:p>
      <text:p text:style-name="P18"><text:span text:style-name="Source_20_Text">MongoDB / PostgreSQL / MySQL</text:span></text:p>
      <text:p text:style-name="P16"/>
      <text:h text:style-name="P19" text:outline-level="2">আপনার (.NET Developer) Perspective</text:h>
      <text:p text:style-name="Text_20_body">আপনি বর্তমানে:</text:p>
      <text:list text:style-name="L26">
        <text:list-item>
          <text:p text:style-name="P33">ASP.NET Core</text:p>
        </text:list-item>
        <text:list-item>
          <text:p text:style-name="P33">Angular</text:p>
        </text:list-item>
        <text:list-item>
          <text:p text:style-name="P33">MSSQL</text:p>
        </text:list-item>
      </text:list>
      <text:p text:style-name="Text_20_body">নিয়ে কাজ করেন।</text:p>
      <text:p text:style-name="Text_20_body">JavaScript ভালোভাবে শিখলে:</text:p>
      <text:h text:style-name="P17" text:outline-level="3">Angular আরও গভীরভাবে বুঝবেন</text:h>
      <text:p text:style-name="Text_20_body">Angular-এর ভিত্তি JavaScript।</text:p>
      <text:p text:style-name="P16"/>
      <text:h text:style-name="P17" text:outline-level="3"><text:soft-page-break/>TypeScript দ্রুত শিখতে পারবেন</text:h>
      <text:p text:style-name="Text_20_body">TypeScript হলো JavaScript-এর Super Set।</text:p>
      <text:p text:style-name="P16"/>
      <text:h text:style-name="P17" text:outline-level="3">Frontend Debugging সহজ হবে</text:h>
      <text:p text:style-name="Text_20_body">Browser DevTools ব্যবহার করে Error Tracking করতে পারবেন।</text:p>
      <text:p text:style-name="P16"/>
      <text:h text:style-name="P17" text:outline-level="3">Full Stack Capability বাড়বে</text:h>
      <text:p text:style-name="Text_20_body">ভবিষ্যতে চাইলে Node.js Backend-ও করতে পারবেন।</text:p>
      <text:p text:style-name="P16"/>
      <text:h text:style-name="P15" text:outline-level="1">4. Career Opportunities</text:h>
      <text:p text:style-name="Text_20_body">JavaScript শেখার পর সম্ভাব্য Career Path:</text:p>
      <text:p text:style-name="P16"/>
      <text:h text:style-name="P19" text:outline-level="2">Frontend Developer</text:h>
      <text:p text:style-name="Text_20_body">Skills:</text:p>
      <text:list text:style-name="L27">
        <text:list-item>
          <text:p text:style-name="P34">HTML</text:p>
        </text:list-item>
        <text:list-item>
          <text:p text:style-name="P34">CSS</text:p>
        </text:list-item>
        <text:list-item>
          <text:p text:style-name="P34">JavaScript</text:p>
        </text:list-item>
        <text:list-item>
          <text:p text:style-name="P34">React / Angular</text:p>
        </text:list-item>
      </text:list>
      <text:p text:style-name="P16"/>
      <text:h text:style-name="P19" text:outline-level="2">Backend Developer</text:h>
      <text:p text:style-name="Text_20_body">Skills:</text:p>
      <text:list text:style-name="L28">
        <text:list-item>
          <text:p text:style-name="P35">Node.js</text:p>
        </text:list-item>
        <text:list-item>
          <text:p text:style-name="P35">Express.js</text:p>
        </text:list-item>
        <text:list-item>
          <text:p text:style-name="P35">Database</text:p>
        </text:list-item>
      </text:list>
      <text:p text:style-name="P16"/>
      <text:h text:style-name="P19" text:outline-level="2">Full Stack Developer</text:h>
      <text:p text:style-name="Text_20_body">Skills:</text:p>
      <text:list text:style-name="L29">
        <text:list-item>
          <text:p text:style-name="P36">Frontend</text:p>
        </text:list-item>
        <text:list-item>
          <text:p text:style-name="P36">Backend</text:p>
        </text:list-item>
        <text:list-item>
          <text:p text:style-name="P36">Database</text:p>
        </text:list-item>
        <text:list-item>
          <text:p text:style-name="P36"><text:soft-page-break/>Deployment</text:p>
        </text:list-item>
      </text:list>
      <text:p text:style-name="P16"/>
      <text:h text:style-name="P19" text:outline-level="2">Mobile App Developer</text:h>
      <text:p text:style-name="Text_20_body">Framework:</text:p>
      <text:list text:style-name="L30">
        <text:list-item>
          <text:p text:style-name="P37">React Native</text:p>
        </text:list-item>
      </text:list>
      <text:p text:style-name="Text_20_body">একই JavaScript Code ব্যবহার করে:</text:p>
      <text:list text:style-name="L31">
        <text:list-item>
          <text:p text:style-name="P38">Android</text:p>
        </text:list-item>
        <text:list-item>
          <text:p text:style-name="P38">iOS</text:p>
        </text:list-item>
      </text:list>
      <text:p text:style-name="Text_20_body">App তৈরি করা যায়।</text:p>
      <text:p text:style-name="P16"/>
      <text:h text:style-name="P19" text:outline-level="2">Desktop App Developer</text:h>
      <text:p text:style-name="Text_20_body">Framework:</text:p>
      <text:list text:style-name="L32">
        <text:list-item>
          <text:p text:style-name="P39">Electron</text:p>
        </text:list-item>
      </text:list>
      <text:p text:style-name="Text_20_body">উদাহরণ:</text:p>
      <text:p text:style-name="Text_20_body">Visual Studio Code</text:p>
      <text:p text:style-name="Text_20_body">নিজেই Electron ব্যবহার করে তৈরি।</text:p>
      <text:p text:style-name="P16"/>
      <text:h text:style-name="P19" text:outline-level="2">Software Architect</text:h>
      <text:p text:style-name="Text_20_body">বড় System Design এবং Architecture Planning।</text:p>
      <text:p text:style-name="P16"/>
      <text:h text:style-name="P19" text:outline-level="2">Technical Lead</text:h>
      <text:p text:style-name="Text_20_body">Development Team পরিচালনা।</text:p>
      <text:p text:style-name="P16"/>
      <text:h text:style-name="P19" text:outline-level="2">Entrepreneur</text:h>
      <text:p text:style-name="Text_20_body">নিজস্ব:</text:p>
      <text:list text:style-name="L33">
        <text:list-item>
          <text:p text:style-name="P40">SaaS ERP</text:p>
        </text:list-item>
        <text:list-item>
          <text:p text:style-name="P40">Inventory Software</text:p>
        </text:list-item>
        <text:list-item>
          <text:p text:style-name="P40">CRM</text:p>
        </text:list-item>
        <text:list-item>
          <text:p text:style-name="P40">HRM</text:p>
        </text:list-item>
      </text:list>
      <text:p text:style-name="Text_20_body">তৈরি করতে পারবেন।</text:p>
      <text:p text:style-name="P16"><text:soft-page-break/></text:p>
      <text:h text:style-name="P15" text:outline-level="1">5. Future Scope of JavaScript</text:h>
      <text:p text:style-name="P16"/>
      <text:h text:style-name="P19" text:outline-level="2">JavaScript কোথাও যাচ্ছে না</text:h>
      <text:p text:style-name="Text_20_body">অনেক Programming Language এসেছে:</text:p>
      <text:list text:style-name="L34">
        <text:list-item>
          <text:p text:style-name="P41">Java</text:p>
        </text:list-item>
        <text:list-item>
          <text:p text:style-name="P41">C#</text:p>
        </text:list-item>
        <text:list-item>
          <text:p text:style-name="P41">Python</text:p>
        </text:list-item>
        <text:list-item>
          <text:p text:style-name="P41">Go</text:p>
        </text:list-item>
        <text:list-item>
          <text:p text:style-name="P41">Rust</text:p>
        </text:list-item>
      </text:list>
      <text:p text:style-name="Text_20_body">কিন্তু Browser এখনও JavaScript-কেই Native Language হিসেবে ব্যবহার করে।</text:p>
      <text:p text:style-name="P16"/>
      <text:h text:style-name="P19" text:outline-level="2">TypeScript-এর উত্থান</text:h>
      <text:p text:style-name="Text_20_body">বর্তমানে বড় Enterprise Project-গুলোতে JavaScript-এর পাশাপাশি TypeScript ব্যাপকভাবে ব্যবহৃত হচ্ছে।</text:p>
      <text:p text:style-name="Text_20_body">TypeScript শেখার ভিত্তি হলো JavaScript।</text:p>
      <text:p text:style-name="P16"/>
      <text:h text:style-name="P19" text:outline-level="2">Cloud Development</text:h>
      <text:p text:style-name="Text_20_body">JavaScript ব্যবহৃত হচ্ছে:</text:p>
      <text:list text:style-name="L35">
        <text:list-item>
          <text:p text:style-name="P42">Serverless Functions</text:p>
        </text:list-item>
        <text:list-item>
          <text:p text:style-name="P42">Cloud APIs</text:p>
        </text:list-item>
        <text:list-item>
          <text:p text:style-name="P42">Microservices</text:p>
        </text:list-item>
      </text:list>
      <text:p text:style-name="P16"/>
      <text:h text:style-name="P19" text:outline-level="2">SaaS Industry</text:h>
      <text:p text:style-name="Text_20_body">বর্তমান SaaS Product-গুলোর বড় অংশ:</text:p>
      <text:list text:style-name="L36">
        <text:list-item>
          <text:p text:style-name="P43">React</text:p>
        </text:list-item>
        <text:list-item>
          <text:p text:style-name="P43">Angular</text:p>
        </text:list-item>
        <text:list-item>
          <text:p text:style-name="P43">Node.js</text:p>
        </text:list-item>
      </text:list>
      <text:p text:style-name="Text_20_body">নির্ভর JavaScript Ecosystem-এর উপর।</text:p>
      <text:p text:style-name="P16"/>
      <text:h text:style-name="P19" text:outline-level="2"><text:soft-page-break/>AI Integration</text:h>
      <text:p text:style-name="Text_20_body">বর্তমানে JavaScript দিয়ে AI Application তৈরি করা সম্ভব।</text:p>
      <text:p text:style-name="Text_20_body">উদাহরণ:</text:p>
      <text:list text:style-name="L37">
        <text:list-item>
          <text:p text:style-name="P44">AI Chatbot</text:p>
        </text:list-item>
        <text:list-item>
          <text:p text:style-name="P44">AI Dashboard</text:p>
        </text:list-item>
        <text:list-item>
          <text:p text:style-name="P44">AI Assistant</text:p>
        </text:list-item>
        <text:list-item>
          <text:p text:style-name="P44">AI-Powered Web App</text:p>
        </text:list-item>
      </text:list>
      <text:p text:style-name="P16"/>
      <text:h text:style-name="P19" text:outline-level="2">Enterprise Development</text:h>
      <text:p text:style-name="Text_20_body">বড় বড় কোম্পানি JavaScript ব্যবহার করছে:</text:p>
      <text:list text:style-name="L38">
        <text:list-item>
          <text:p text:style-name="P45"><text:a xlink:type="simple" xlink:href="https://www.microsoft.com/?utm_source=chatgpt.com" text:style-name="Internet_20_link" text:visited-style-name="Visited_20_Internet_20_Link">Microsoft</text:a></text:p>
        </text:list-item>
        <text:list-item>
          <text:p text:style-name="P45"><text:a xlink:type="simple" xlink:href="https://www.google.com/?utm_source=chatgpt.com" text:style-name="Internet_20_link" text:visited-style-name="Visited_20_Internet_20_Link">Google</text:a></text:p>
        </text:list-item>
        <text:list-item>
          <text:p text:style-name="P45"><text:a xlink:type="simple" xlink:href="https://about.meta.com/?utm_source=chatgpt.com" text:style-name="Internet_20_link" text:visited-style-name="Visited_20_Internet_20_Link">Meta</text:a></text:p>
        </text:list-item>
        <text:list-item>
          <text:p text:style-name="P45"><text:a xlink:type="simple" xlink:href="https://www.netflix.com/?utm_source=chatgpt.com" text:style-name="Internet_20_link" text:visited-style-name="Visited_20_Internet_20_Link">Netflix</text:a></text:p>
        </text:list-item>
        <text:list-item>
          <text:p text:style-name="P45"><text:a xlink:type="simple" xlink:href="https://www.amazon.com/?utm_source=chatgpt.com" text:style-name="Internet_20_link" text:visited-style-name="Visited_20_Internet_20_Link">Amazon</text:a></text:p>
        </text:list-item>
      </text:list>
      <text:p text:style-name="P16"/>
      <text:h text:style-name="P15" text:outline-level="1">Summary</text:h>
      <text:p text:style-name="Text_20_body">এই অধ্যায় থেকে যা শিখলাম:</text:p>
      <text:p text:style-name="Text_20_body">✅ JavaScript হলো Web Development-এর মূল ভাষা</text:p>
      <text:p text:style-name="Text_20_body">✅ Browser-এ Native Support থাকার কারণে এর গুরুত্ব অত্যন্ত বেশি</text:p>
      <text:p text:style-name="Text_20_body">✅ Frontend, Backend, Mobile, Desktop—সবখানেই JavaScript ব্যবহার করা যায়</text:p>
      <text:p text:style-name="Text_20_body">✅ Node.js-এর কারণে Full Stack Development সম্ভব হয়েছে</text:p>
      <text:p text:style-name="Text_20_body">✅ JavaScript জানলে Angular, React এবং TypeScript শেখা সহজ হয়</text:p>
      <text:p text:style-name="Text_20_body">✅ বর্তমান এবং ভবিষ্যতের Software Industry-তে JavaScript-এর চাহিদা অত্যন্ত শক্তিশালী</text:p>
      <text:p text:style-name="P16"/>
      <text:h text:style-name="P15" text:outline-level="1">Interview Questions</text:h>
      <text:list text:style-name="L39">
        <text:list-item>
          <text:p text:style-name="P46">JavaScript শেখা কেন গুরুত্বপূর্ণ?</text:p>
        </text:list-item>
        <text:list-item>
          <text:p text:style-name="P46">JavaScript-এর বর্তমান মার্কেট ডিমান্ড কেমন?</text:p>
        </text:list-item>
        <text:list-item>
          <text:p text:style-name="P46">Full Stack Development-এ JavaScript-এর ভূমিকা কী?</text:p>
        </text:list-item>
        <text:list-item>
          <text:p text:style-name="P46"><text:soft-page-break/>Node.js কীভাবে JavaScript-এর গুরুত্ব বাড়িয়েছে?</text:p>
        </text:list-item>
        <text:list-item>
          <text:p text:style-name="P46">JavaScript ব্যবহার করে কী কী ধরনের Application তৈরি করা যায়?</text:p>
        </text:list-item>
        <text:list-item>
          <text:p text:style-name="P46">একজন .NET Developer-এর JavaScript শেখা কেন উপকারী?</text:p>
        </text:list-item>
        <text:list-item>
          <text:p text:style-name="P46">JavaScript এবং TypeScript-এর সম্পর্ক কী?</text:p>
        </text:list-item>
        <text:list-item>
          <text:p text:style-name="P46">JavaScript-এর Future Scope সম্পর্কে বলুন।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5" text:outline-level="1"><text:soft-page-break/>Step 3: Where JavaScript is Used?</text:h>
      <text:p text:style-name="P16"/>
      <text:h text:style-name="P15" text:outline-level="1">ভূমিকা</text:h>
      <text:p text:style-name="Text_20_body">অনেকেই মনে করেন JavaScript শুধুমাত্র Website-এর Button Click বা Animation তৈরির জন্য ব্যবহৃত হয়। বাস্তবে JavaScript বর্তমানে পৃথিবীর সবচেয়ে Versatile Programming Language-গুলোর একটি।</text:p>
      <text:p text:style-name="Text_20_body">আজ JavaScript ব্যবহার করে তৈরি করা যায়:</text:p>
      <text:list text:style-name="L40">
        <text:list-item>
          <text:p text:style-name="P47">Website</text:p>
        </text:list-item>
        <text:list-item>
          <text:p text:style-name="P47">Web Application</text:p>
        </text:list-item>
        <text:list-item>
          <text:p text:style-name="P47">Mobile App</text:p>
        </text:list-item>
        <text:list-item>
          <text:p text:style-name="P47">Desktop Software</text:p>
        </text:list-item>
        <text:list-item>
          <text:p text:style-name="P47">Backend API</text:p>
        </text:list-item>
        <text:list-item>
          <text:p text:style-name="P47">Real-Time Chat System</text:p>
        </text:list-item>
        <text:list-item>
          <text:p text:style-name="P47">Game</text:p>
        </text:list-item>
        <text:list-item>
          <text:p text:style-name="P47">AI Application</text:p>
        </text:list-item>
        <text:list-item>
          <text:p text:style-name="P47">IoT Device Control System</text:p>
        </text:list-item>
      </text:list>
      <text:p text:style-name="Text_20_body">অর্থাৎ, একটি মাত্র Language শিখে Software Development-এর প্রায় সব ক্ষেত্রেই কাজ করা সম্ভব।</text:p>
      <text:p text:style-name="P16"/>
      <text:h text:style-name="P15" text:outline-level="1">1. Browser Development</text:h>
      <text:h text:style-name="P19" text:outline-level="2">Browser Development কী?</text:h>
      <text:p text:style-name="Text_20_body">Browser-এর ভিতরে চলা Logic এবং User Interaction তৈরি করার জন্য JavaScript ব্যবহার করা হয়।</text:p>
      <text:p text:style-name="Text_20_body">যখন আপনি কোনো Website-এ:</text:p>
      <text:list text:style-name="L41">
        <text:list-item>
          <text:p text:style-name="P48">Button Click করেন</text:p>
        </text:list-item>
        <text:list-item>
          <text:p text:style-name="P48">Form পূরণ করেন</text:p>
        </text:list-item>
        <text:list-item>
          <text:p text:style-name="P48">Menu Open করেন</text:p>
        </text:list-item>
        <text:list-item>
          <text:p text:style-name="P48">Search করেন</text:p>
        </text:list-item>
      </text:list>
      <text:p text:style-name="Text_20_body">তখন সাধারণত JavaScript কাজ করছে।</text:p>
      <text:p text:style-name="P16"/>
      <text:h text:style-name="P19" text:outline-level="2"><text:soft-page-break/>উদাহরণ</text:h>
      <text:p text:style-name="Text_20_body">ধরুন Login Form আছে:</text:p>
      <text:p text:style-name="P18"><text:span text:style-name="Source_20_Text">Email</text:span></text:p>
      <text:p text:style-name="P18"><text:span text:style-name="Source_20_Text">Password</text:span></text:p>
      <text:p text:style-name="P18"><text:span text:style-name="Source_20_Text">Login Button</text:span></text:p>
      <text:p text:style-name="Text_20_body">JavaScript চেক করতে পারে:</text:p>
      <text:p text:style-name="P18"><text:span text:style-name="Source_20_Text">Email ফাঁকা কি না</text:span></text:p>
      <text:p text:style-name="P18"><text:span text:style-name="Source_20_Text">Password দেওয়া হয়েছে কি না</text:span></text:p>
      <text:p text:style-name="Text_20_body">Server-এ Request পাঠানোর আগেই Validation সম্পন্ন হয়।</text:p>
      <text:p text:style-name="P16"/>
      <text:h text:style-name="P19" text:outline-level="2">Browser Development-এ JavaScript কী করে?</text:h>
      <text:h text:style-name="P17" text:outline-level="3">DOM Manipulation</text:h>
      <text:p text:style-name="Text_20_body">ওয়েব পেজের Element পরিবর্তন করে।</text:p>
      <text:p text:style-name="Text_20_body">উদাহরণ:</text:p>
      <text:p text:style-name="P18"><text:span text:style-name="Source_20_Text">document.getElementById("title").innerText = "Welcome";</text:span></text:p>
      <text:p text:style-name="P16"/>
      <text:h text:style-name="P17" text:outline-level="3">Event Handling</text:h>
      <text:p text:style-name="Text_20_body">User-এর Action Detect করে।</text:p>
      <text:p text:style-name="Text_20_body">উদাহরণ:</text:p>
      <text:p text:style-name="P18"><text:span text:style-name="Source_20_Text">button.addEventListener("click", function () {</text:span></text:p>
      <text:p text:style-name="P18"><text:span text:style-name="Source_20_Text"><text:s text:c="4"/>alert("Clicked");</text:span></text:p>
      <text:p text:style-name="P18"><text:span text:style-name="Source_20_Text">});</text:span></text:p>
      <text:p text:style-name="P16"/>
      <text:h text:style-name="P17" text:outline-level="3">Animation</text:h>
      <text:list text:style-name="L42">
        <text:list-item>
          <text:p text:style-name="P49">Slider</text:p>
        </text:list-item>
        <text:list-item>
          <text:p text:style-name="P49">Popup</text:p>
        </text:list-item>
        <text:list-item>
          <text:p text:style-name="P49">Dropdown</text:p>
        </text:list-item>
        <text:list-item>
          <text:p text:style-name="P49">Modal</text:p>
        </text:list-item>
      </text:list>
      <text:p text:style-name="Text_20_body">তৈরি করতে ব্যবহৃত হয়।</text:p>
      <text:p text:style-name="P16"/>
      <text:h text:style-name="P15" text:outline-level="1"><text:soft-page-break/>2. Web Applications</text:h>
      <text:p text:style-name="P16"/>
      <text:h text:style-name="P19" text:outline-level="2">Web Application কী?</text:h>
      <text:p text:style-name="Text_20_body">যে Application Browser-এ চলে কিন্তু Desktop Software-এর মতো কাজ করে তাকে Web Application বলে।</text:p>
      <text:p text:style-name="P16"/>
      <text:h text:style-name="P19" text:outline-level="2">উদাহরণ</text:h>
      <text:h text:style-name="P17" text:outline-level="3">Social Media</text:h>
      <text:list text:style-name="L43">
        <text:list-item>
          <text:p text:style-name="P50"><text:a xlink:type="simple" xlink:href="https://www.facebook.com/?utm_source=chatgpt.com" text:style-name="Internet_20_link" text:visited-style-name="Visited_20_Internet_20_Link">Facebook</text:a></text:p>
        </text:list-item>
        <text:list-item>
          <text:p text:style-name="P50"><text:a xlink:type="simple" xlink:href="https://www.linkedin.com/?utm_source=chatgpt.com" text:style-name="Internet_20_link" text:visited-style-name="Visited_20_Internet_20_Link">LinkedIn</text:a></text:p>
        </text:list-item>
      </text:list>
      <text:p text:style-name="P16"/>
      <text:h text:style-name="P17" text:outline-level="3">Video Platforms</text:h>
      <text:list text:style-name="L44">
        <text:list-item>
          <text:p text:style-name="P51"><text:a xlink:type="simple" xlink:href="https://www.youtube.com/?utm_source=chatgpt.com" text:style-name="Internet_20_link" text:visited-style-name="Visited_20_Internet_20_Link">YouTube</text:a></text:p>
        </text:list-item>
      </text:list>
      <text:p text:style-name="P16"/>
      <text:h text:style-name="P17" text:outline-level="3">Email Systems</text:h>
      <text:list text:style-name="L45">
        <text:list-item>
          <text:p text:style-name="P52"><text:a xlink:type="simple" xlink:href="https://mail.google.com/?utm_source=chatgpt.com" text:style-name="Internet_20_link" text:visited-style-name="Visited_20_Internet_20_Link">Gmail</text:a></text:p>
        </text:list-item>
      </text:list>
      <text:p text:style-name="P16"/>
      <text:h text:style-name="P17" text:outline-level="3">Project Management</text:h>
      <text:list text:style-name="L46">
        <text:list-item>
          <text:p text:style-name="P53"><text:a xlink:type="simple" xlink:href="https://trello.com/?utm_source=chatgpt.com" text:style-name="Internet_20_link" text:visited-style-name="Visited_20_Internet_20_Link">Trello</text:a></text:p>
        </text:list-item>
        <text:list-item>
          <text:p text:style-name="P53"><text:a xlink:type="simple" xlink:href="https://asana.com/?utm_source=chatgpt.com" text:style-name="Internet_20_link" text:visited-style-name="Visited_20_Internet_20_Link">Asana</text:a></text:p>
        </text:list-item>
      </text:list>
      <text:p text:style-name="P16"/>
      <text:h text:style-name="P19" text:outline-level="2">ব্যবহৃত Framework</text:h>
      <text:h text:style-name="P17" text:outline-level="3">Frontend</text:h>
      <text:list text:style-name="L47">
        <text:list-item>
          <text:p text:style-name="P54">React</text:p>
        </text:list-item>
        <text:list-item>
          <text:p text:style-name="P54">Angular</text:p>
        </text:list-item>
        <text:list-item>
          <text:p text:style-name="P54">Vue.js</text:p>
        </text:list-item>
      </text:list>
      <text:p text:style-name="P16"/>
      <text:h text:style-name="P19" text:outline-level="2">আপনার ERP Perspective</text:h>
      <text:p text:style-name="Text_20_body">আপনি যেহেতু ERP Software নিয়ে কাজ করেন:</text:p>
      <text:p text:style-name="Text_20_body">JavaScript ব্যবহার হয়:</text:p>
      <text:list text:style-name="L48">
        <text:list-item>
          <text:p text:style-name="P55"><text:soft-page-break/>Dashboard</text:p>
        </text:list-item>
        <text:list-item>
          <text:p text:style-name="P55">Reports</text:p>
        </text:list-item>
        <text:list-item>
          <text:p text:style-name="P55">Charts</text:p>
        </text:list-item>
        <text:list-item>
          <text:p text:style-name="P55">Dynamic Forms</text:p>
        </text:list-item>
        <text:list-item>
          <text:p text:style-name="P55">Inventory Screen</text:p>
        </text:list-item>
        <text:list-item>
          <text:p text:style-name="P55">Search Panel</text:p>
        </text:list-item>
        <text:list-item>
          <text:p text:style-name="P55">Barcode Management UI</text:p>
        </text:list-item>
      </text:list>
      <text:p text:style-name="Text_20_body">এগুলোকে User-Friendly করার জন্য।</text:p>
      <text:p text:style-name="P16"/>
      <text:h text:style-name="P15" text:outline-level="1">3. Mobile Applications</text:h>
      <text:p text:style-name="P16"/>
      <text:h text:style-name="P19" text:outline-level="2">JavaScript দিয়ে Mobile App?</text:h>
      <text:p text:style-name="Text_20_body">হ্যাঁ।</text:p>
      <text:p text:style-name="Text_20_body">একটি JavaScript Codebase ব্যবহার করে Android এবং iOS App তৈরি করা যায়।</text:p>
      <text:p text:style-name="P16"/>
      <text:h text:style-name="P19" text:outline-level="2">জনপ্রিয় Framework</text:h>
      <text:h text:style-name="P17" text:outline-level="3">React Native</text:h>
      <text:p text:style-name="Text_20_body">এটি JavaScript ব্যবহার করে Mobile App তৈরি করে।</text:p>
      <text:p text:style-name="P16"/>
      <text:h text:style-name="P19" text:outline-level="2">উদাহরণ</text:h>
      <text:list text:style-name="L49">
        <text:list-item>
          <text:p text:style-name="P56">Food Delivery App</text:p>
        </text:list-item>
        <text:list-item>
          <text:p text:style-name="P56">E-Commerce App</text:p>
        </text:list-item>
        <text:list-item>
          <text:p text:style-name="P56">Learning App</text:p>
        </text:list-item>
        <text:list-item>
          <text:p text:style-name="P56">ERP Mobile App</text:p>
        </text:list-item>
      </text:list>
      <text:p text:style-name="P16"/>
      <text:h text:style-name="P19" text:outline-level="2">সুবিধা</text:h>
      <text:p text:style-name="Text_20_body">একই Code:</text:p>
      <text:p text:style-name="P18"><text:span text:style-name="Source_20_Text">Android</text:span></text:p>
      <text:p text:style-name="P18"><text:span text:style-name="Source_20_Text">iPhone</text:span></text:p>
      <text:p text:style-name="Text_20_body"><text:soft-page-break/>দুই Platform-এ ব্যবহার করা যায়।</text:p>
      <text:p text:style-name="P16"/>
      <text:h text:style-name="P15" text:outline-level="1">4. Desktop Applications</text:h>
      <text:p text:style-name="P16"/>
      <text:h text:style-name="P19" text:outline-level="2">Desktop Application কী?</text:h>
      <text:p text:style-name="Text_20_body">যে Software সরাসরি Windows, Linux বা MacOS-এ Install করা হয়।</text:p>
      <text:p text:style-name="P16"/>
      <text:h text:style-name="P19" text:outline-level="2">Framework</text:h>
      <text:h text:style-name="P17" text:outline-level="3">Electron</text:h>
      <text:p text:style-name="Text_20_body">JavaScript ব্যবহার করে Desktop Software তৈরি করা যায়।</text:p>
      <text:p text:style-name="P16"/>
      <text:h text:style-name="P19" text:outline-level="2">জনপ্রিয় উদাহরণ</text:h>
      <text:h text:style-name="P17" text:outline-level="3">Visual Studio Code</text:h>
      <text:p text:style-name="P16"/>
      <text:h text:style-name="P17" text:outline-level="3">Discord</text:h>
      <text:p text:style-name="P16"/>
      <text:h text:style-name="P17" text:outline-level="3">Slack</text:h>
      <text:p text:style-name="P16"/>
      <text:h text:style-name="P19" text:outline-level="2">সুবিধা</text:h>
      <text:p text:style-name="Text_20_body">একই Code ব্যবহার করে:</text:p>
      <text:list text:style-name="L50">
        <text:list-item>
          <text:p text:style-name="P57">Windows</text:p>
        </text:list-item>
        <text:list-item>
          <text:p text:style-name="P57">Linux</text:p>
        </text:list-item>
        <text:list-item>
          <text:p text:style-name="P57">MacOS</text:p>
        </text:list-item>
      </text:list>
      <text:p text:style-name="Text_20_body">Software তৈরি করা যায়।</text:p>
      <text:p text:style-name="P16"/>
      <text:h text:style-name="P15" text:outline-level="1">5. Backend Development</text:h>
      <text:p text:style-name="P16"/>
      <text:h text:style-name="P19" text:outline-level="2">Backend কী?</text:h>
      <text:p text:style-name="Text_20_body">যে অংশ:</text:p>
      <text:list text:style-name="L51">
        <text:list-item>
          <text:p text:style-name="P58"><text:soft-page-break/>Database Handle করে</text:p>
        </text:list-item>
        <text:list-item>
          <text:p text:style-name="P58">Business Logic Execute করে</text:p>
        </text:list-item>
        <text:list-item>
          <text:p text:style-name="P58">API তৈরি করে</text:p>
        </text:list-item>
      </text:list>
      <text:p text:style-name="Text_20_body">তাকে Backend বলে।</text:p>
      <text:p text:style-name="P16"/>
      <text:h text:style-name="P19" text:outline-level="2">JavaScript Backend-এ কীভাবে কাজ করে?</text:h>
      <text:p text:style-name="Text_20_body">এর জন্য ব্যবহৃত হয়:</text:p>
      <text:h text:style-name="P17" text:outline-level="3">Node.js</text:h>
      <text:p text:style-name="P16"/>
      <text:h text:style-name="P19" text:outline-level="2">Node.js কী?</text:h>
      <text:p text:style-name="Text_20_body">Node.js Browser-এর বাইরে JavaScript Run করতে দেয়।</text:p>
      <text:p text:style-name="P16"/>
      <text:h text:style-name="P19" text:outline-level="2">Node.js দিয়ে কী করা যায়?</text:h>
      <text:h text:style-name="P17" text:outline-level="3">REST API</text:h>
      <text:p text:style-name="P18"><text:span text:style-name="Source_20_Text">Login API</text:span></text:p>
      <text:p text:style-name="P18"><text:span text:style-name="Source_20_Text">Product API</text:span></text:p>
      <text:p text:style-name="P18"><text:span text:style-name="Source_20_Text">Order API</text:span></text:p>
      <text:p text:style-name="P16"/>
      <text:h text:style-name="P17" text:outline-level="3">Authentication</text:h>
      <text:p text:style-name="P18"><text:span text:style-name="Source_20_Text">JWT</text:span></text:p>
      <text:p text:style-name="P18"><text:span text:style-name="Source_20_Text">OAuth</text:span></text:p>
      <text:p text:style-name="P18"><text:span text:style-name="Source_20_Text">Session</text:span></text:p>
      <text:p text:style-name="P16"/>
      <text:h text:style-name="P17" text:outline-level="3">Database Connection</text:h>
      <text:list text:style-name="L52">
        <text:list-item>
          <text:p text:style-name="P59">PostgreSQL</text:p>
        </text:list-item>
        <text:list-item>
          <text:p text:style-name="P59">MSSQL</text:p>
        </text:list-item>
        <text:list-item>
          <text:p text:style-name="P59">MySQL</text:p>
        </text:list-item>
        <text:list-item>
          <text:p text:style-name="P59">MongoDB</text:p>
        </text:list-item>
      </text:list>
      <text:p text:style-name="P16"/>
      <text:h text:style-name="P19" text:outline-level="2"><text:soft-page-break/>আপনার .NET Perspective</text:h>
      <text:p text:style-name="Text_20_body">ASP.NET Core-এর মতোই Node.js ব্যবহার করে Backend তৈরি করা যায়।</text:p>
      <text:p text:style-name="P16"/>
      <text:h text:style-name="P15" text:outline-level="1">6. Game Development</text:h>
      <text:p text:style-name="P16"/>
      <text:h text:style-name="P19" text:outline-level="2">JavaScript দিয়ে Game তৈরি করা যায়?</text:h>
      <text:p text:style-name="Text_20_body">অবশ্যই।</text:p>
      <text:p text:style-name="Text_20_body">Browser-Based Game তৈরিতে JavaScript ব্যাপকভাবে ব্যবহৃত হয়।</text:p>
      <text:p text:style-name="P16"/>
      <text:h text:style-name="P19" text:outline-level="2">উদাহরণ</text:h>
      <text:h text:style-name="P17" text:outline-level="3">2D Games</text:h>
      <text:list text:style-name="L53">
        <text:list-item>
          <text:p text:style-name="P60">Puzzle</text:p>
        </text:list-item>
        <text:list-item>
          <text:p text:style-name="P60">Racing</text:p>
        </text:list-item>
        <text:list-item>
          <text:p text:style-name="P60">Card Game</text:p>
        </text:list-item>
      </text:list>
      <text:p text:style-name="P16"/>
      <text:h text:style-name="P17" text:outline-level="3">Educational Games</text:h>
      <text:list text:style-name="L54">
        <text:list-item>
          <text:p text:style-name="P61">Quiz System</text:p>
        </text:list-item>
        <text:list-item>
          <text:p text:style-name="P61">Learning Platform</text:p>
        </text:list-item>
      </text:list>
      <text:p text:style-name="P16"/>
      <text:h text:style-name="P19" text:outline-level="2">জনপ্রিয় Framework</text:h>
      <text:h text:style-name="P17" text:outline-level="3">Phaser</text:h>
      <text:p text:style-name="P16"/>
      <text:h text:style-name="P19" text:outline-level="2">Browser API</text:h>
      <text:p text:style-name="Text_20_body">JavaScript ব্যবহার করে:</text:p>
      <text:p text:style-name="P18"><text:span text:style-name="Source_20_Text">Canvas</text:span></text:p>
      <text:p text:style-name="P18"><text:span text:style-name="Source_20_Text">WebGL</text:span></text:p>
      <text:p text:style-name="Text_20_body">এর মাধ্যমে Graphics Render করা যায়।</text:p>
      <text:p text:style-name="P16"/>
      <text:h text:style-name="P15" text:outline-level="1"><text:soft-page-break/>7. AI &amp; Machine Learning</text:h>
      <text:p text:style-name="P16"/>
      <text:h text:style-name="P19" text:outline-level="2">AI-তে JavaScript?</text:h>
      <text:p text:style-name="Text_20_body">অনেকেই মনে করেন AI শুধুমাত্র Python দিয়ে হয়।</text:p>
      <text:p text:style-name="Text_20_body">বাস্তবে JavaScript দিয়েও AI Application তৈরি করা যায়।</text:p>
      <text:p text:style-name="P16"/>
      <text:h text:style-name="P19" text:outline-level="2">JavaScript AI-এর ব্যবহার</text:h>
      <text:h text:style-name="P17" text:outline-level="3">Chatbot</text:h>
      <text:list text:style-name="L55">
        <text:list-item>
          <text:p text:style-name="P62">Customer Support Bot</text:p>
        </text:list-item>
        <text:list-item>
          <text:p text:style-name="P62">ERP Assistant</text:p>
        </text:list-item>
      </text:list>
      <text:p text:style-name="P16"/>
      <text:h text:style-name="P17" text:outline-level="3">Recommendation System</text:h>
      <text:p text:style-name="P18"><text:span text:style-name="Source_20_Text">Product Suggestion</text:span></text:p>
      <text:p text:style-name="P18"><text:span text:style-name="Source_20_Text">Movie Suggestion</text:span></text:p>
      <text:p text:style-name="P16"/>
      <text:h text:style-name="P17" text:outline-level="3">Image Recognition</text:h>
      <text:p text:style-name="Text_20_body">Browser-এর মধ্যেই AI Model Run করা যায়।</text:p>
      <text:p text:style-name="P16"/>
      <text:h text:style-name="P19" text:outline-level="2">জনপ্রিয় Library</text:h>
      <text:h text:style-name="P17" text:outline-level="3">TensorFlow.js</text:h>
      <text:p text:style-name="P16"/>
      <text:h text:style-name="P19" text:outline-level="2">সুবিধা</text:h>
      <text:p text:style-name="Text_20_body">AI Model Browser-এর মধ্যেই Run করা যায়।</text:p>
      <text:p text:style-name="Text_20_body">Server-এ পাঠাতে হয় না।</text:p>
      <text:p text:style-name="P16"/>
      <text:h text:style-name="P15" text:outline-level="1">8. IoT Devices</text:h>
      <text:p text:style-name="P16"/>
      <text:h text:style-name="P19" text:outline-level="2">IoT কী?</text:h>
      <text:p text:style-name="Text_20_body">Internet of Things (IoT) হলো এমন Device যা Internet-এর সাথে Connected থাকে।</text:p>
      <text:p text:style-name="Text_20_body"><text:soft-page-break/>উদাহরণ:</text:p>
      <text:list text:style-name="L56">
        <text:list-item>
          <text:p text:style-name="P63">Smart Light</text:p>
        </text:list-item>
        <text:list-item>
          <text:p text:style-name="P63">Smart Fan</text:p>
        </text:list-item>
        <text:list-item>
          <text:p text:style-name="P63">Smart Camera</text:p>
        </text:list-item>
        <text:list-item>
          <text:p text:style-name="P63">Smart Door Lock</text:p>
        </text:list-item>
      </text:list>
      <text:p text:style-name="P16"/>
      <text:h text:style-name="P19" text:outline-level="2">JavaScript-এর ভূমিকা</text:h>
      <text:p text:style-name="Text_20_body">JavaScript ব্যবহার করে:</text:p>
      <text:list text:style-name="L57">
        <text:list-item>
          <text:p text:style-name="P64">Device Monitor</text:p>
        </text:list-item>
        <text:list-item>
          <text:p text:style-name="P64">Device Control</text:p>
        </text:list-item>
        <text:list-item>
          <text:p text:style-name="P64">Sensor Data Process</text:p>
        </text:list-item>
        <text:list-item>
          <text:p text:style-name="P64">Dashboard তৈরি</text:p>
        </text:list-item>
      </text:list>
      <text:p text:style-name="Text_20_body">করা যায়।</text:p>
      <text:p text:style-name="P16"/>
      <text:h text:style-name="P19" text:outline-level="2">ব্যবহৃত Runtime</text:h>
      <text:h text:style-name="P17" text:outline-level="3">Node.js</text:h>
      <text:p text:style-name="Text_20_body">অনেক IoT System-এর Backend হিসেবে ব্যবহৃত হয়।</text:p>
      <text:p text:style-name="P16"/>
      <text:h text:style-name="P19" text:outline-level="2">উদাহরণ</text:h>
      <text:p text:style-name="Text_20_body">ধরুন একটি Smart Factory আছে।</text:p>
      <text:p text:style-name="Text_20_body">JavaScript দিয়ে:</text:p>
      <text:p text:style-name="P18"><text:span text:style-name="Source_20_Text">Temperature Sensor Reading</text:span></text:p>
      <text:p text:style-name="P18"><text:span text:style-name="Source_20_Text">Machine Monitoring</text:span></text:p>
      <text:p text:style-name="P18"><text:span text:style-name="Source_20_Text">Alert System</text:span></text:p>
      <text:p text:style-name="P18"><text:span text:style-name="Source_20_Text">Dashboard</text:span></text:p>
      <text:p text:style-name="Text_20_body">তৈরি করা যায়।</text:p>
      <text:p text:style-name="P16"/>
      <text:h text:style-name="P15" text:outline-level="1"><text:soft-page-break/>JavaScript কোথায় কোথায় ব্যবহৃত হয়? (সংক্ষিপ্ত টেবিল)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ক্ষেত্র</text:p>
            </table:table-cell>
            <table:table-cell table:style-name="Table4.A1" office:value-type="string">
              <text:p text:style-name="Table_20_Heading">ব্যবহার</text:p>
            </table:table-cell>
          </table:table-row>
        </table:table-header-rows>
        <table:table-row>
          <table:table-cell table:style-name="Table4.A1" office:value-type="string">
            <text:p text:style-name="Table_20_Contents">Browser</text:p>
          </table:table-cell>
          <table:table-cell table:style-name="Table4.A1" office:value-type="string">
            <text:p text:style-name="Table_20_Contents">DOM, Event, Animation</text:p>
          </table:table-cell>
        </table:table-row>
        <table:table-row>
          <table:table-cell table:style-name="Table4.A1" office:value-type="string">
            <text:p text:style-name="Table_20_Contents">Web Application</text:p>
          </table:table-cell>
          <table:table-cell table:style-name="Table4.A1" office:value-type="string">
            <text:p text:style-name="Table_20_Contents">ERP, CRM, E-Commerce</text:p>
          </table:table-cell>
        </table:table-row>
        <table:table-row>
          <table:table-cell table:style-name="Table4.A1" office:value-type="string">
            <text:p text:style-name="Table_20_Contents">Mobile App</text:p>
          </table:table-cell>
          <table:table-cell table:style-name="Table4.A1" office:value-type="string">
            <text:p text:style-name="Table_20_Contents">Android, iOS</text:p>
          </table:table-cell>
        </table:table-row>
        <table:table-row>
          <table:table-cell table:style-name="Table4.A1" office:value-type="string">
            <text:p text:style-name="Table_20_Contents">Desktop App</text:p>
          </table:table-cell>
          <table:table-cell table:style-name="Table4.A1" office:value-type="string">
            <text:p text:style-name="Table_20_Contents">Windows, Linux, Mac</text:p>
          </table:table-cell>
        </table:table-row>
        <table:table-row>
          <table:table-cell table:style-name="Table4.A1" office:value-type="string">
            <text:p text:style-name="Table_20_Contents">Backend</text:p>
          </table:table-cell>
          <table:table-cell table:style-name="Table4.A1" office:value-type="string">
            <text:p text:style-name="Table_20_Contents">API, Authentication</text:p>
          </table:table-cell>
        </table:table-row>
        <table:table-row>
          <table:table-cell table:style-name="Table4.A1" office:value-type="string">
            <text:p text:style-name="Table_20_Contents">Game</text:p>
          </table:table-cell>
          <table:table-cell table:style-name="Table4.A1" office:value-type="string">
            <text:p text:style-name="Table_20_Contents">Browser Game</text:p>
          </table:table-cell>
        </table:table-row>
        <table:table-row>
          <table:table-cell table:style-name="Table4.A1" office:value-type="string">
            <text:p text:style-name="Table_20_Contents">AI</text:p>
          </table:table-cell>
          <table:table-cell table:style-name="Table4.A1" office:value-type="string">
            <text:p text:style-name="Table_20_Contents">Chatbot, ML Models</text:p>
          </table:table-cell>
        </table:table-row>
        <table:table-row>
          <table:table-cell table:style-name="Table4.A1" office:value-type="string">
            <text:p text:style-name="Table_20_Contents">IoT</text:p>
          </table:table-cell>
          <table:table-cell table:style-name="Table4.A1" office:value-type="string">
            <text:p text:style-name="Table_20_Contents">Smart Devices</text:p>
          </table:table-cell>
        </table:table-row>
      </table:table>
      <text:p text:style-name="P16"/>
      <text:h text:style-name="P15" text:outline-level="1">Summary</text:h>
      <text:p text:style-name="Text_20_body">এই অধ্যায় থেকে যা শিখলাম:</text:p>
      <text:p text:style-name="Text_20_body">✅ JavaScript শুধুমাত্র Browser Language নয়</text:p>
      <text:p text:style-name="Text_20_body">✅ Web Application তৈরিতে সবচেয়ে বেশি ব্যবহৃত হয়</text:p>
      <text:p text:style-name="Text_20_body">✅ React Native দিয়ে Mobile App তৈরি করা যায়</text:p>
      <text:p text:style-name="Text_20_body">✅ Electron দিয়ে Desktop Software তৈরি করা যায়</text:p>
      <text:p text:style-name="Text_20_body">✅ Node.js দিয়ে Backend Development করা যায়</text:p>
      <text:p text:style-name="Text_20_body">✅ Game Development-এ JavaScript ব্যবহার হয়</text:p>
      <text:p text:style-name="Text_20_body">✅ TensorFlow.js ব্যবহার করে AI Application তৈরি করা যায়</text:p>
      <text:p text:style-name="Text_20_body">✅ IoT Device Monitoring এবং Control System-এ JavaScript ব্যবহৃত হয়</text:p>
      <text:p text:style-name="P16"/>
      <text:h text:style-name="P15" text:outline-level="1">Interview Questions</text:h>
      <text:list text:style-name="L58">
        <text:list-item>
          <text:p text:style-name="P65">JavaScript কোথায় কোথায় ব্যবহৃত হয়?</text:p>
        </text:list-item>
        <text:list-item>
          <text:p text:style-name="P65">Browser Development-এ JavaScript-এর ভূমিকা কী?</text:p>
        </text:list-item>
        <text:list-item>
          <text:p text:style-name="P65">Node.js কী এবং কেন ব্যবহৃত হয়?</text:p>
        </text:list-item>
        <text:list-item>
          <text:p text:style-name="P65">React Native কী কাজে লাগে?</text:p>
        </text:list-item>
        <text:list-item>
          <text:p text:style-name="P65">Electron কী?</text:p>
        </text:list-item>
        <text:list-item>
          <text:p text:style-name="P65">JavaScript দিয়ে কি Desktop Application তৈরি করা যায়?</text:p>
        </text:list-item>
        <text:list-item>
          <text:p text:style-name="P65"><text:soft-page-break/>JavaScript দিয়ে AI Application তৈরি করা সম্ভব কি?</text:p>
        </text:list-item>
        <text:list-item>
          <text:p text:style-name="P65">IoT System-এ JavaScript কীভাবে ব্যবহৃত হয়?</text:p>
        </text:list-item>
        <text:list-item>
          <text:p text:style-name="P65">Web Application এবং Website-এর মধ্যে পার্থক্য কী?</text:p>
        </text:list-item>
        <text:list-item>
          <text:p text:style-name="P65">Full Stack Development-এ JavaScript কেন গুরুত্বপূর্ণ?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5" text:outline-level="1"><text:soft-page-break/>Step 4: JavaScript Ecosystem Overview</text:h>
      <text:p text:style-name="P16"/>
      <text:h text:style-name="P15" text:outline-level="1">ভূমিকা</text:h>
      <text:p text:style-name="Text_20_body">JavaScript শেখার সময় সবচেয়ে বেশি শোনা যায় এমন একটি শব্দ হলো <text:span text:style-name="Strong_20_Emphasis">"JavaScript Ecosystem"</text:span>।</text:p>
      <text:p text:style-name="Text_20_body">অনেক নতুন Developer মনে করেন JavaScript মানেই শুধু একটি Programming Language। কিন্তু বাস্তবে JavaScript-এর চারপাশে হাজার হাজার Tool, Framework, Library, Runtime, Package Manager এবং Development Platform গড়ে উঠেছে।</text:p>
      <text:p text:style-name="Text_20_body">এই পুরো Environment-কেই JavaScript Ecosystem বলা হয়।</text:p>
      <text:p text:style-name="P16"/>
      <text:h text:style-name="P15" text:outline-level="1">1. JavaScript Ecosystem কী?</text:h>
      <text:h text:style-name="P19" text:outline-level="2">সংজ্ঞা</text:h>
      <text:p text:style-name="Text_20_body">JavaScript Ecosystem হলো JavaScript Language-এর চারপাশে গড়ে ওঠা সব Tool, Library, Framework, Runtime, Package Manager এবং Development Technologies-এর সমষ্টি।</text:p>
      <text:p text:style-name="Text_20_body">সহজ ভাষায়:</text:p>
      <text:p text:style-name="P18"><text:span text:style-name="Source_20_Text">JavaScript Language</text:span></text:p>
      <text:p text:style-name="P18"><text:span text:style-name="Source_20_Text"><text:s text:c="8"/>+</text:span></text:p>
      <text:p text:style-name="P18"><text:span text:style-name="Source_20_Text">Runtime</text:span></text:p>
      <text:p text:style-name="P18"><text:span text:style-name="Source_20_Text"><text:s text:c="8"/>+</text:span></text:p>
      <text:p text:style-name="P18"><text:span text:style-name="Source_20_Text">Framework</text:span></text:p>
      <text:p text:style-name="P18"><text:span text:style-name="Source_20_Text"><text:s text:c="8"/>+</text:span></text:p>
      <text:p text:style-name="P18"><text:span text:style-name="Source_20_Text">Library</text:span></text:p>
      <text:p text:style-name="P18"><text:span text:style-name="Source_20_Text"><text:s text:c="8"/>+</text:span></text:p>
      <text:p text:style-name="P18"><text:span text:style-name="Source_20_Text">Package Manager</text:span></text:p>
      <text:p text:style-name="P18"><text:span text:style-name="Source_20_Text"><text:s text:c="8"/>+</text:span></text:p>
      <text:p text:style-name="P18"><text:span text:style-name="Source_20_Text">Build Tools</text:span></text:p>
      <text:p text:style-name="P18"><text:span text:style-name="Source_20_Text"><text:s text:c="8"/>=</text:span></text:p>
      <text:p text:style-name="P18"><text:span text:style-name="Source_20_Text">JavaScript Ecosystem</text:span></text:p>
      <text:p text:style-name="P16"/>
      <text:h text:style-name="P19" text:outline-level="2">বাস্তব উদাহরণ</text:h>
      <text:p text:style-name="Text_20_body">ধরুন আপনি একটি E-Commerce Website তৈরি করছেন।</text:p>
      <text:p text:style-name="Text_20_body"><text:soft-page-break/>আপনি ব্যবহার করছেন:</text:p>
      <text:p text:style-name="P18"><text:span text:style-name="Source_20_Text">Frontend</text:span></text:p>
      <text:p text:style-name="P18"><text:span text:style-name="Source_20_Text"><text:s text:c="4"/>React</text:span></text:p>
      <text:p text:style-name="P18"/>
      <text:p text:style-name="P18"><text:span text:style-name="Source_20_Text">Backend</text:span></text:p>
      <text:p text:style-name="P18"><text:span text:style-name="Source_20_Text"><text:s text:c="4"/>Node.js</text:span></text:p>
      <text:p text:style-name="P18"/>
      <text:p text:style-name="P18"><text:span text:style-name="Source_20_Text">Database</text:span></text:p>
      <text:p text:style-name="P18"><text:span text:style-name="Source_20_Text"><text:s text:c="4"/>PostgreSQL</text:span></text:p>
      <text:p text:style-name="P18"/>
      <text:p text:style-name="P18"><text:span text:style-name="Source_20_Text">Package Manager</text:span></text:p>
      <text:p text:style-name="P18"><text:span text:style-name="Source_20_Text"><text:s text:c="4"/>npm</text:span></text:p>
      <text:p text:style-name="P18"/>
      <text:p text:style-name="P18"><text:span text:style-name="Source_20_Text">Build Tool</text:span></text:p>
      <text:p text:style-name="P18"><text:span text:style-name="Source_20_Text"><text:s text:c="4"/>Vite</text:span></text:p>
      <text:p text:style-name="P18"/>
      <text:p text:style-name="P18"><text:span text:style-name="Source_20_Text">Version Control</text:span></text:p>
      <text:p text:style-name="P18"><text:span text:style-name="Source_20_Text"><text:s text:c="4"/>Git</text:span></text:p>
      <text:p text:style-name="Text_20_body">এই পুরো Technology Stack-ই JavaScript Ecosystem-এর অংশ।</text:p>
      <text:p text:style-name="P16"/>
      <text:h text:style-name="P15" text:outline-level="1">JavaScript Ecosystem এর High-Level Architecture</text:h>
      <text:p text:style-name="P18"><text:span text:style-name="Source_20_Text"><text:s text:c="19"/>JavaScript</text:span></text:p>
      <text:p text:style-name="P18"/>
      <text:p text:style-name="P18"><text:span text:style-name="Source_20_Text"><text:s text:c="24"/>│</text:span></text:p>
      <text:p text:style-name="P18"/>
      <text:p text:style-name="P18"><text:span text:style-name="Source_20_Text"><text:s text:c="8"/>┌───────────────┼───────────────┐</text:span></text:p>
      <text:p text:style-name="P18"/>
      <text:p text:style-name="P18"><text:span text:style-name="Source_20_Text"><text:s text:c="8"/>│ <text:s text:c="30"/>│</text:span></text:p>
      <text:p text:style-name="P18"/>
      <text:p text:style-name="P18"><text:span text:style-name="Source_20_Text"><text:s text:c="5"/>Frontend <text:s text:c="22"/>Backend</text:span></text:p>
      <text:p text:style-name="P18"/>
      <text:p text:style-name="P18"><text:soft-page-break/><text:span text:style-name="Source_20_Text"><text:s text:c="8"/>│ <text:s text:c="30"/>│</text:span></text:p>
      <text:p text:style-name="P18"/>
      <text:p text:style-name="P18"><text:span text:style-name="Source_20_Text"><text:s/>React / Angular / Vue <text:s text:c="10"/>Node.js</text:span></text:p>
      <text:p text:style-name="P18"/>
      <text:p text:style-name="P18"><text:span text:style-name="Source_20_Text"><text:s text:c="8"/>│ <text:s text:c="30"/>│</text:span></text:p>
      <text:p text:style-name="P18"/>
      <text:p text:style-name="P18"><text:span text:style-name="Source_20_Text"><text:s text:c="4"/>Build Tools <text:s text:c="16"/>Database</text:span></text:p>
      <text:p text:style-name="P18"/>
      <text:p text:style-name="P18"><text:span text:style-name="Source_20_Text"><text:s text:c="8"/>│ <text:s text:c="30"/>│</text:span></text:p>
      <text:p text:style-name="P18"/>
      <text:p text:style-name="P18"><text:span text:style-name="Source_20_Text">Webpack / Vite <text:s text:c="14"/>PostgreSQL</text:span></text:p>
      <text:p text:style-name="P18"/>
      <text:p text:style-name="P18"><text:span text:style-name="Source_20_Text"><text:s text:c="8"/>│</text:span></text:p>
      <text:p text:style-name="P18"/>
      <text:p text:style-name="P18"><text:span text:style-name="Source_20_Text"><text:s/>Package Manager</text:span></text:p>
      <text:p text:style-name="P18"/>
      <text:p text:style-name="P18"><text:span text:style-name="Source_20_Text"><text:s text:c="8"/>│</text:span></text:p>
      <text:p text:style-name="P18"/>
      <text:p text:style-name="P18"><text:span text:style-name="Source_20_Text"><text:s/>npm / Yarn / pnpm</text:span></text:p>
      <text:p text:style-name="P16"/>
      <text:h text:style-name="P15" text:outline-level="1">2. Runtime</text:h>
      <text:p text:style-name="P16"/>
      <text:h text:style-name="P19" text:outline-level="2">Runtime কী?</text:h>
      <text:p text:style-name="Text_20_body">Runtime হলো এমন একটি Environment যেখানে JavaScript Code Execute হয়।</text:p>
      <text:p text:style-name="Text_20_body">JavaScript নিজে কোনো Software নয়।</text:p>
      <text:p text:style-name="Text_20_body">JavaScript Run করার জন্য Runtime Environment দরকার।</text:p>
      <text:p text:style-name="P16"/>
      <text:h text:style-name="P19" text:outline-level="2">Browser Runtime</text:h>
      <text:p text:style-name="Text_20_body">সব Browser-এর ভেতরে JavaScript Runtime থাকে।</text:p>
      <text:p text:style-name="Text_20_body">উদাহরণ:</text:p>
      <text:list text:style-name="L59">
        <text:list-item>
          <text:p text:style-name="P66">Google Chrome</text:p>
        </text:list-item>
        <text:list-item>
          <text:p text:style-name="P66">Mozilla Firefox</text:p>
        </text:list-item>
        <text:list-item>
          <text:p text:style-name="P66"><text:soft-page-break/>Microsoft Edge</text:p>
        </text:list-item>
        <text:list-item>
          <text:p text:style-name="P66">Safari</text:p>
        </text:list-item>
      </text:list>
      <text:p text:style-name="P16"/>
      <text:h text:style-name="P19" text:outline-level="2">Browser Runtime কী দেয়?</text:h>
      <text:list text:style-name="L60">
        <text:list-item>
          <text:p text:style-name="P67">DOM Access</text:p>
        </text:list-item>
        <text:list-item>
          <text:p text:style-name="P67">Window Object</text:p>
        </text:list-item>
        <text:list-item>
          <text:p text:style-name="P67">Event System</text:p>
        </text:list-item>
        <text:list-item>
          <text:p text:style-name="P67">Local Storage</text:p>
        </text:list-item>
        <text:list-item>
          <text:p text:style-name="P67">Cookies</text:p>
        </text:list-item>
        <text:list-item>
          <text:p text:style-name="P67">Fetch API</text:p>
        </text:list-item>
      </text:list>
      <text:p text:style-name="P16"/>
      <text:h text:style-name="P19" text:outline-level="2">Node.js Runtime</text:h>
      <text:p text:style-name="Text_20_body">Node.js</text:p>
      <text:p text:style-name="Text_20_body">Browser-এর বাইরে JavaScript Run করার Environment।</text:p>
      <text:p text:style-name="P16"/>
      <text:h text:style-name="P19" text:outline-level="2">Node.js দিয়ে কী করা যায়?</text:h>
      <text:list text:style-name="L61">
        <text:list-item>
          <text:p text:style-name="P68">Backend API</text:p>
        </text:list-item>
        <text:list-item>
          <text:p text:style-name="P68">Authentication</text:p>
        </text:list-item>
        <text:list-item>
          <text:p text:style-name="P68">Database Access</text:p>
        </text:list-item>
        <text:list-item>
          <text:p text:style-name="P68">File Processing</text:p>
        </text:list-item>
        <text:list-item>
          <text:p text:style-name="P68">Background Jobs</text:p>
        </text:list-item>
      </text:list>
      <text:p text:style-name="P16"/>
      <text:h text:style-name="P19" text:outline-level="2">Runtime-এর উদাহরণ</text:h>
      <text:p text:style-name="P18"><text:span text:style-name="Source_20_Text">console.log("Hello JavaScript");</text:span></text:p>
      <text:p text:style-name="Text_20_body">এই Code কোথাও না কোথাও Run হবে।</text:p>
      <text:p text:style-name="Text_20_body">Runtime সেই Environment সরবরাহ করে।</text:p>
      <text:p text:style-name="P16"/>
      <text:h text:style-name="P15" text:outline-level="1">3. Framework</text:h>
      <text:p text:style-name="P16"/>
      <text:h text:style-name="P19" text:outline-level="2"><text:soft-page-break/>Framework কী?</text:h>
      <text:p text:style-name="Text_20_body">Framework হলো Pre-Built Structure যা Application Development সহজ করে।</text:p>
      <text:p text:style-name="Text_20_body">Framework সাধারণত Development-এর Architecture নির্ধারণ করে দেয়।</text:p>
      <text:p text:style-name="P16"/>
      <text:h text:style-name="P19" text:outline-level="2">Framework-এর কাজ</text:h>
      <text:p text:style-name="Text_20_body">Framework আপনাকে বলে:</text:p>
      <text:p text:style-name="P18"><text:span text:style-name="Source_20_Text">Project Structure কেমন হবে</text:span></text:p>
      <text:p text:style-name="P18"><text:span text:style-name="Source_20_Text">Routing কিভাবে হবে</text:span></text:p>
      <text:p text:style-name="P18"><text:span text:style-name="Source_20_Text">State Management কিভাবে হবে</text:span></text:p>
      <text:p text:style-name="P16"/>
      <text:h text:style-name="P19" text:outline-level="2">জনপ্রিয় JavaScript Framework</text:h>
      <text:h text:style-name="P17" text:outline-level="3">Angular</text:h>
      <text:p text:style-name="Text_20_body">Google-এর তৈরি Framework।</text:p>
      <text:p text:style-name="P16"/>
      <text:h text:style-name="P17" text:outline-level="3">Vue.js</text:h>
      <text:p text:style-name="Text_20_body">Lightweight Framework।</text:p>
      <text:p text:style-name="P16"/>
      <text:h text:style-name="P17" text:outline-level="3">Next.js</text:h>
      <text:p text:style-name="Text_20_body">React-এর উপর ভিত্তি করে তৈরি।</text:p>
      <text:p text:style-name="P16"/>
      <text:h text:style-name="P19" text:outline-level="2">Framework-এর সুবিধা</text:h>
      <text:list text:style-name="L62">
        <text:list-item>
          <text:p text:style-name="P69">Faster Development</text:p>
        </text:list-item>
        <text:list-item>
          <text:p text:style-name="P69">Standard Structure</text:p>
        </text:list-item>
        <text:list-item>
          <text:p text:style-name="P69">Scalability</text:p>
        </text:list-item>
        <text:list-item>
          <text:p text:style-name="P69">Maintainability</text:p>
        </text:list-item>
      </text:list>
      <text:p text:style-name="P16"/>
      <text:h text:style-name="P15" text:outline-level="1">4. Library</text:h>
      <text:p text:style-name="P16"/>
      <text:h text:style-name="P19" text:outline-level="2">Library কী?</text:h>
      <text:p text:style-name="Text_20_body">Library হলো Ready-Made Functions এবং Features-এর Collection।</text:p>
      <text:p text:style-name="Text_20_body"><text:soft-page-break/>Framework-এর মতো পুরো Application Structure দেয় না।</text:p>
      <text:p text:style-name="Text_20_body">আপনি প্রয়োজন অনুযায়ী Library ব্যবহার করেন।</text:p>
      <text:p text:style-name="P16"/>
      <text:h text:style-name="P19" text:outline-level="2">সহজ উদাহরণ</text:h>
      <text:p text:style-name="Text_20_body">Framework:</text:p>
      <text:p text:style-name="P18"><text:span text:style-name="Source_20_Text">Framework আপনাকে Call করে</text:span></text:p>
      <text:p text:style-name="Text_20_body">Library:</text:p>
      <text:p text:style-name="P18"><text:span text:style-name="Source_20_Text">আপনি Library-কে Call করেন</text:span></text:p>
      <text:p text:style-name="P16"/>
      <text:h text:style-name="P19" text:outline-level="2">জনপ্রিয় Library</text:h>
      <text:h text:style-name="P17" text:outline-level="3">React</text:h>
      <text:p text:style-name="Text_20_body">UI তৈরির জন্য।</text:p>
      <text:p text:style-name="P16"/>
      <text:h text:style-name="P17" text:outline-level="3">jQuery</text:h>
      <text:p text:style-name="Text_20_body">DOM Manipulation সহজ করে।</text:p>
      <text:p text:style-name="P16"/>
      <text:h text:style-name="P17" text:outline-level="3">Chart.js</text:h>
      <text:p text:style-name="Text_20_body">Charts তৈরির জন্য।</text:p>
      <text:p text:style-name="P16"/>
      <text:h text:style-name="P19" text:outline-level="2">React Library কেন?</text:h>
      <text:p text:style-name="Text_20_body">React মূলত UI Layer Handle করে।</text:p>
      <text:p text:style-name="Text_20_body">Routing, State Management, API ইত্যাদির জন্য আলাদা Library ব্যবহার করা যায়।</text:p>
      <text:p text:style-name="P16"/>
      <text:h text:style-name="P15" text:outline-level="1">Framework vs Library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Library</text:p>
            </table:table-cell>
            <table:table-cell table:style-name="Table5.A1" office:value-type="string">
              <text:p text:style-name="Table_20_Heading">Framework</text:p>
            </table:table-cell>
          </table:table-row>
        </table:table-header-rows>
        <table:table-row>
          <table:table-cell table:style-name="Table5.A1" office:value-type="string">
            <text:p text:style-name="Table_20_Contents">Specific Problem Solve করে</text:p>
          </table:table-cell>
          <table:table-cell table:style-name="Table5.A1" office:value-type="string">
            <text:p text:style-name="Table_20_Contents">পুরো Structure দেয়</text:p>
          </table:table-cell>
        </table:table-row>
        <table:table-row>
          <table:table-cell table:style-name="Table5.A1" office:value-type="string">
            <text:p text:style-name="Table_20_Contents">Flexible</text:p>
          </table:table-cell>
          <table:table-cell table:style-name="Table5.A1" office:value-type="string">
            <text:p text:style-name="Table_20_Contents">Opinionated</text:p>
          </table:table-cell>
        </table:table-row>
        <table:table-row>
          <table:table-cell table:style-name="Table5.A1" office:value-type="string">
            <text:p text:style-name="Table_20_Contents">React</text:p>
          </table:table-cell>
          <table:table-cell table:style-name="Table5.A1" office:value-type="string">
            <text:p text:style-name="Table_20_Contents">Angular</text:p>
          </table:table-cell>
        </table:table-row>
        <table:table-row>
          <table:table-cell table:style-name="Table5.A1" office:value-type="string">
            <text:p text:style-name="Table_20_Contents">jQuery</text:p>
          </table:table-cell>
          <table:table-cell table:style-name="Table5.A1" office:value-type="string">
            <text:p text:style-name="Table_20_Contents">Angular</text:p>
          </table:table-cell>
        </table:table-row>
        <table:table-row>
          <table:table-cell table:style-name="Table5.A1" office:value-type="string">
            <text:p text:style-name="Table_20_Contents">Chart.js</text:p>
          </table:table-cell>
          <table:table-cell table:style-name="Table5.A1" office:value-type="string">
            <text:p text:style-name="Table_20_Contents">Vue.js</text:p>
          </table:table-cell>
        </table:table-row>
      </table:table>
      <text:p text:style-name="P16"/>
      <text:h text:style-name="P15" text:outline-level="1"><text:soft-page-break/>5. Package Manager</text:h>
      <text:p text:style-name="P16"/>
      <text:h text:style-name="P19" text:outline-level="2">Package Manager কী?</text:h>
      <text:p text:style-name="Text_20_body">Package Manager হলো Software Dependency Management Tool।</text:p>
      <text:p text:style-name="P16"/>
      <text:h text:style-name="P19" text:outline-level="2">Dependency কী?</text:h>
      <text:p text:style-name="Text_20_body">আপনার Project যদি অন্য কোনো Library ব্যবহার করে:</text:p>
      <text:p text:style-name="P18"><text:span text:style-name="Source_20_Text">React</text:span></text:p>
      <text:p text:style-name="P18"><text:span text:style-name="Source_20_Text">Axios</text:span></text:p>
      <text:p text:style-name="P18"><text:span text:style-name="Source_20_Text">Lodash</text:span></text:p>
      <text:p text:style-name="P18"><text:span text:style-name="Source_20_Text">Bootstrap</text:span></text:p>
      <text:p text:style-name="Text_20_body">তাহলে এগুলো Dependency।</text:p>
      <text:p text:style-name="P16"/>
      <text:h text:style-name="P19" text:outline-level="2">Package Manager কী করে?</text:h>
      <text:h text:style-name="P17" text:outline-level="3">Install</text:h>
      <text:p text:style-name="P18"><text:span text:style-name="Source_20_Text">npm install react</text:span></text:p>
      <text:p text:style-name="P16"/>
      <text:h text:style-name="P17" text:outline-level="3">Update</text:h>
      <text:p text:style-name="P18"><text:span text:style-name="Source_20_Text">npm update</text:span></text:p>
      <text:p text:style-name="P16"/>
      <text:h text:style-name="P17" text:outline-level="3">Remove</text:h>
      <text:p text:style-name="P18"><text:span text:style-name="Source_20_Text">npm uninstall react</text:span></text:p>
      <text:p text:style-name="P16"/>
      <text:h text:style-name="P19" text:outline-level="2">জনপ্রিয় Package Manager</text:h>
      <text:h text:style-name="P17" text:outline-level="3">npm</text:h>
      <text:p text:style-name="Text_20_body">Node.js-এর Default Package Manager।</text:p>
      <text:p text:style-name="P16"/>
      <text:h text:style-name="P17" text:outline-level="3">Yarn</text:h>
      <text:p text:style-name="Text_20_body">Facebook তৈরি করেছে।</text:p>
      <text:p text:style-name="P16"/>
      <text:h text:style-name="P17" text:outline-level="3"><text:soft-page-break/>pnpm</text:h>
      <text:p text:style-name="Text_20_body">বর্তমানে Performance-এর জন্য জনপ্রিয়।</text:p>
      <text:p text:style-name="P16"/>
      <text:h text:style-name="P19" text:outline-level="2">npm Registry</text:h>
      <text:p text:style-name="Text_20_body">বর্তমানে লক্ষ লক্ষ Open Source Package রয়েছে npm Registry-তে।</text:p>
      <text:p text:style-name="P16"/>
      <text:h text:style-name="P15" text:outline-level="1">6. Build Tools</text:h>
      <text:p text:style-name="P16"/>
      <text:h text:style-name="P19" text:outline-level="2">Build Tool কী?</text:h>
      <text:p text:style-name="Text_20_body">Development-এর Code-কে Production Ready Code-এ রূপান্তর করে।</text:p>
      <text:p text:style-name="P16"/>
      <text:h text:style-name="P19" text:outline-level="2">Build Tool-এর কাজ</text:h>
      <text:h text:style-name="P17" text:outline-level="3">Minification</text:h>
      <text:p text:style-name="Text_20_body">Code ছোট করা।</text:p>
      <text:p text:style-name="P16"/>
      <text:h text:style-name="P17" text:outline-level="3">Bundling</text:h>
      <text:p text:style-name="Text_20_body">একাধিক File একত্র করা।</text:p>
      <text:p text:style-name="P16"/>
      <text:h text:style-name="P17" text:outline-level="3">Optimization</text:h>
      <text:p text:style-name="Text_20_body">Performance বাড়ানো।</text:p>
      <text:p text:style-name="P16"/>
      <text:h text:style-name="P17" text:outline-level="3">Transpilation</text:h>
      <text:p text:style-name="Text_20_body">নতুন JavaScript-কে পুরোনো Browser Compatible Code-এ রূপান্তর করা।</text:p>
      <text:p text:style-name="P16"/>
      <text:h text:style-name="P19" text:outline-level="2">জনপ্রিয় Build Tools</text:h>
      <text:h text:style-name="P17" text:outline-level="3">Vite</text:h>
      <text:p text:style-name="Text_20_body">বর্তমানে সবচেয়ে জনপ্রিয় Build Tool-গুলোর একটি।</text:p>
      <text:p text:style-name="P16"/>
      <text:h text:style-name="P17" text:outline-level="3">Webpack</text:h>
      <text:p text:style-name="Text_20_body">Enterprise Project-এ বহুল ব্যবহৃত।</text:p>
      <text:p text:style-name="P16"><text:soft-page-break/></text:p>
      <text:h text:style-name="P17" text:outline-level="3">Babel</text:h>
      <text:p text:style-name="Text_20_body">Modern JavaScript-কে Browser Compatible করে।</text:p>
      <text:p text:style-name="P16"/>
      <text:h text:style-name="P19" text:outline-level="2">বাস্তব উদাহরণ</text:h>
      <text:p text:style-name="Text_20_body">Development Time:</text:p>
      <text:p text:style-name="P18"><text:span text:style-name="Source_20_Text">import React from "react";</text:span></text:p>
      <text:p text:style-name="Text_20_body">Build Tool:</text:p>
      <text:p text:style-name="P18"><text:span text:style-name="Source_20_Text">Bundle তৈরি করে</text:span></text:p>
      <text:p text:style-name="P18"><text:span text:style-name="Source_20_Text">Optimize করে</text:span></text:p>
      <text:p text:style-name="P18"><text:span text:style-name="Source_20_Text">Production File তৈরি করে</text:span></text:p>
      <text:p text:style-name="P16"/>
      <text:h text:style-name="P15" text:outline-level="1">একটি Real Project-এ Ecosystem কেমন দেখায়?</text:h>
      <text:p text:style-name="Text_20_body">ধরুন আপনি একটি ERP System তৈরি করছেন।</text:p>
      <text:h text:style-name="P17" text:outline-level="3">Frontend</text:h>
      <text:p text:style-name="P18"><text:span text:style-name="Source_20_Text">React</text:span></text:p>
      <text:h text:style-name="P17" text:outline-level="3">Runtime</text:h>
      <text:p text:style-name="P18"><text:span text:style-name="Source_20_Text">Browser</text:span></text:p>
      <text:h text:style-name="P17" text:outline-level="3">Package Manager</text:h>
      <text:p text:style-name="P18"><text:span text:style-name="Source_20_Text">npm</text:span></text:p>
      <text:h text:style-name="P17" text:outline-level="3">Build Tool</text:h>
      <text:p text:style-name="P18"><text:span text:style-name="Source_20_Text">Vite</text:span></text:p>
      <text:h text:style-name="P17" text:outline-level="3">Backend</text:h>
      <text:p text:style-name="P18"><text:span text:style-name="Source_20_Text">Node.js</text:span></text:p>
      <text:p text:style-name="P18"><text:span text:style-name="Source_20_Text">Express.js</text:span></text:p>
      <text:h text:style-name="P17" text:outline-level="3">Database</text:h>
      <text:p text:style-name="P18"><text:span text:style-name="Source_20_Text">PostgreSQL</text:span></text:p>
      <text:p text:style-name="P16"/>
      <text:h text:style-name="P15" text:outline-level="1"><text:soft-page-break/>আপনার (.NET Developer) Perspective</text:h>
      <text:p text:style-name="Text_20_body">আপনি যেহেতু:</text:p>
      <text:list text:style-name="L63">
        <text:list-item>
          <text:p text:style-name="P70">ASP.NET Core</text:p>
        </text:list-item>
        <text:list-item>
          <text:p text:style-name="P70">Angular</text:p>
        </text:list-item>
        <text:list-item>
          <text:p text:style-name="P70">MSSQL</text:p>
        </text:list-item>
      </text:list>
      <text:p text:style-name="Text_20_body">নিয়ে কাজ করেন,</text:p>
      <text:p text:style-name="Text_20_body">তাই JavaScript Ecosystem-এর সাথে আপনার পরিচিত জিনিসগুলো হলো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.NET World</text:p>
            </table:table-cell>
            <table:table-cell table:style-name="Table6.A1" office:value-type="string">
              <text:p text:style-name="Table_20_Heading">JavaScript World</text:p>
            </table:table-cell>
          </table:table-row>
        </table:table-header-rows>
        <table:table-row>
          <table:table-cell table:style-name="Table6.A1" office:value-type="string">
            <text:p text:style-name="Table_20_Contents">.NET Runtime</text:p>
          </table:table-cell>
          <table:table-cell table:style-name="Table6.A1" office:value-type="string">
            <text:p text:style-name="Table_20_Contents">Node.js Runtime</text:p>
          </table:table-cell>
        </table:table-row>
        <table:table-row>
          <table:table-cell table:style-name="Table6.A1" office:value-type="string">
            <text:p text:style-name="Table_20_Contents">NuGet</text:p>
          </table:table-cell>
          <table:table-cell table:style-name="Table6.A1" office:value-type="string">
            <text:p text:style-name="Table_20_Contents">npm</text:p>
          </table:table-cell>
        </table:table-row>
        <table:table-row>
          <table:table-cell table:style-name="Table6.A1" office:value-type="string">
            <text:p text:style-name="Table_20_Contents">ASP.NET MVC</text:p>
          </table:table-cell>
          <table:table-cell table:style-name="Table6.A1" office:value-type="string">
            <text:p text:style-name="Table_20_Contents">Angular</text:p>
          </table:table-cell>
        </table:table-row>
        <table:table-row>
          <table:table-cell table:style-name="Table6.A1" office:value-type="string">
            <text:p text:style-name="Table_20_Contents">DLL Package</text:p>
          </table:table-cell>
          <table:table-cell table:style-name="Table6.A1" office:value-type="string">
            <text:p text:style-name="Table_20_Contents">npm Package</text:p>
          </table:table-cell>
        </table:table-row>
        <table:table-row>
          <table:table-cell table:style-name="Table6.A1" office:value-type="string">
            <text:p text:style-name="Table_20_Contents">MSBuild</text:p>
          </table:table-cell>
          <table:table-cell table:style-name="Table6.A1" office:value-type="string">
            <text:p text:style-name="Table_20_Contents">Vite/Webpack</text:p>
          </table:table-cell>
        </table:table-row>
        <table:table-row>
          <table:table-cell table:style-name="Table6.A1" office:value-type="string">
            <text:p text:style-name="Table_20_Contents">C# Library</text:p>
          </table:table-cell>
          <table:table-cell table:style-name="Table6.A1" office:value-type="string">
            <text:p text:style-name="Table_20_Contents">JavaScript Library</text:p>
          </table:table-cell>
        </table:table-row>
      </table:table>
      <text:p text:style-name="P16"/>
      <text:h text:style-name="P15" text:outline-level="1">Summary</text:h>
      <text:p text:style-name="Text_20_body">এই অধ্যায় থেকে যা শিখলাম:</text:p>
      <text:p text:style-name="Text_20_body">✅ JavaScript Ecosystem হলো JavaScript-এর চারপাশের সম্পূর্ণ Technology Environment</text:p>
      <text:p text:style-name="Text_20_body">✅ Runtime Code Execute করে</text:p>
      <text:p text:style-name="Text_20_body">✅ Framework Application Structure দেয়</text:p>
      <text:p text:style-name="Text_20_body">✅ Library নির্দিষ্ট Feature সরবরাহ করে</text:p>
      <text:p text:style-name="Text_20_body">✅ Package Manager Dependency Manage করে</text:p>
      <text:p text:style-name="Text_20_body">✅ Build Tool Development Code-কে Production Ready Code-এ রূপান্তর করে</text:p>
      <text:p text:style-name="Text_20_body">✅ Modern Web Development মূলত JavaScript Ecosystem-এর উপর দাঁড়িয়ে আছে</text:p>
      <text:p text:style-name="P16"/>
      <text:h text:style-name="P15" text:outline-level="1">Interview Questions</text:h>
      <text:list text:style-name="L64">
        <text:list-item>
          <text:p text:style-name="P71">JavaScript Ecosystem বলতে কী বোঝায়?</text:p>
        </text:list-item>
        <text:list-item>
          <text:p text:style-name="P71">Runtime কী?</text:p>
        </text:list-item>
        <text:list-item>
          <text:p text:style-name="P71">Browser Runtime এবং Node.js Runtime-এর পার্থক্য কী?</text:p>
        </text:list-item>
        <text:list-item>
          <text:p text:style-name="P71">Framework কী?</text:p>
        </text:list-item>
        <text:list-item>
          <text:p text:style-name="P71"><text:soft-page-break/>Library কী?</text:p>
        </text:list-item>
        <text:list-item>
          <text:p text:style-name="P71">Framework এবং Library-এর মধ্যে পার্থক্য কী?</text:p>
        </text:list-item>
        <text:list-item>
          <text:p text:style-name="P71">npm কী?</text:p>
        </text:list-item>
        <text:list-item>
          <text:p text:style-name="P71">Yarn এবং pnpm কী?</text:p>
        </text:list-item>
        <text:list-item>
          <text:p text:style-name="P71">Build Tool কী?</text:p>
        </text:list-item>
        <text:list-item>
          <text:p text:style-name="P71">Vite, Webpack এবং Babel-এর কাজ কী?</text:p>
        </text:list-item>
        <text:list-item>
          <text:p text:style-name="P71">Dependency বলতে কী বোঝায়?</text:p>
        </text:list-item>
        <text:list-item>
          <text:p text:style-name="P71">JavaScript Ecosystem-এ Package Manager-এর ভূমিকা কী?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5" text:outline-level="1"><text:soft-page-break/>Section 2: Setting Up JavaScript Environment</text:h>
      <text:h text:style-name="P15" text:outline-level="1">Step 5: JavaScript Runtime Environment</text:h>
      <text:p text:style-name="P16"/>
      <text:h text:style-name="P15" text:outline-level="1">ভূমিকা</text:h>
      <text:p text:style-name="Text_20_body">JavaScript শেখার সময় অনেকেই Code লেখা শুরু করে দেন, কিন্তু JavaScript Code আসলে <text:span text:style-name="Strong_20_Emphasis">কীভাবে Run হয়</text:span>, <text:span text:style-name="Strong_20_Emphasis">Browser কীভাবে JavaScript বুঝে</text:span>, <text:span text:style-name="Strong_20_Emphasis">V8 Engine কী</text:span>, <text:span text:style-name="Strong_20_Emphasis">SpiderMonkey কী</text:span>, কিংবা <text:span text:style-name="Strong_20_Emphasis">Execution Process কীভাবে কাজ করে</text:span>—এসব বিষয় না জানলে JavaScript-এর ভিতরের Architecture বোঝা কঠিন।</text:p>
      <text:p text:style-name="Text_20_body">এই অধ্যায়ে আমরা JavaScript-এর "Engine থেকে Execution" পর্যন্ত পুরো Flow বুঝবো।</text:p>
      <text:p text:style-name="P16"/>
      <text:h text:style-name="P15" text:outline-level="1">JavaScript Runtime Environment কী?</text:h>
      <text:h text:style-name="P19" text:outline-level="2">সংজ্ঞা</text:h>
      <text:p text:style-name="Text_20_body">JavaScript Runtime Environment হলো এমন একটি Environment যেখানে JavaScript Code Execute হয়।</text:p>
      <text:p text:style-name="Text_20_body">JavaScript নিজে কোনো Application নয়।</text:p>
      <text:p text:style-name="Text_20_body">এটি Run করার জন্য একটি Runtime Environment প্রয়োজন।</text:p>
      <text:p text:style-name="P16"/>
      <text:h text:style-name="P19" text:outline-level="2">Runtime Environment-এর Components</text:h>
      <text:p text:style-name="P18"><text:span text:style-name="Source_20_Text">JavaScript Code</text:span></text:p>
      <text:p text:style-name="P18"><text:span text:style-name="Source_20_Text"><text:s text:c="7"/>│</text:span></text:p>
      <text:p text:style-name="P18"><text:span text:style-name="Source_20_Text"><text:s text:c="7"/>▼</text:span></text:p>
      <text:p text:style-name="P18"><text:span text:style-name="Source_20_Text">JavaScript Engine</text:span></text:p>
      <text:p text:style-name="P18"><text:span text:style-name="Source_20_Text"><text:s text:c="7"/>│</text:span></text:p>
      <text:p text:style-name="P18"><text:span text:style-name="Source_20_Text"><text:s text:c="7"/>▼</text:span></text:p>
      <text:p text:style-name="P18"><text:span text:style-name="Source_20_Text">Runtime Environment</text:span></text:p>
      <text:p text:style-name="P18"><text:span text:style-name="Source_20_Text"><text:s text:c="7"/>│</text:span></text:p>
      <text:p text:style-name="P18"><text:span text:style-name="Source_20_Text"><text:s text:c="7"/>▼</text:span></text:p>
      <text:p text:style-name="P18"><text:span text:style-name="Source_20_Text">Operating System</text:span></text:p>
      <text:p text:style-name="P16"/>
      <text:h text:style-name="P19" text:outline-level="2"><text:soft-page-break/>বাস্তব উদাহরণ</text:h>
      <text:p text:style-name="Text_20_body">যখন আপনি লেখেন:</text:p>
      <text:p text:style-name="P18"><text:span text:style-name="Source_20_Text">console.log("Hello World");</text:span></text:p>
      <text:p text:style-name="Text_20_body">JavaScript নিজে Output দেখাতে পারে না।</text:p>
      <text:p text:style-name="Text_20_body">Runtime Environment:</text:p>
      <text:list text:style-name="L65">
        <text:list-item>
          <text:p text:style-name="P72">Code Execute করে</text:p>
        </text:list-item>
        <text:list-item>
          <text:p text:style-name="P72">Memory Allocate করে</text:p>
        </text:list-item>
        <text:list-item>
          <text:p text:style-name="P72">Console Output দেখায়</text:p>
        </text:list-item>
      </text:list>
      <text:p text:style-name="P16"/>
      <text:h text:style-name="P15" text:outline-level="1">Browser Engine</text:h>
      <text:p text:style-name="P16"/>
      <text:h text:style-name="P19" text:outline-level="2">Browser Engine কী?</text:h>
      <text:p text:style-name="Text_20_body">Browser Engine হলো Browser-এর Core Component যা:</text:p>
      <text:list text:style-name="L66">
        <text:list-item>
          <text:p text:style-name="P73">HTML Parse করে</text:p>
        </text:list-item>
        <text:list-item>
          <text:p text:style-name="P73">CSS Render করে</text:p>
        </text:list-item>
        <text:list-item>
          <text:p text:style-name="P73">JavaScript Execute করতে সাহায্য করে</text:p>
        </text:list-item>
        <text:list-item>
          <text:p text:style-name="P73">Screen-এ Page Render করে</text:p>
        </text:list-item>
      </text:list>
      <text:p text:style-name="P16"/>
      <text:h text:style-name="P19" text:outline-level="2">Browser Engine-এর কাজ</text:h>
      <text:p text:style-name="Text_20_body">ধরুন Browser একটি Website Open করলো।</text:p>
      <text:p text:style-name="P18"><text:span text:style-name="Source_20_Text">HTML</text:span></text:p>
      <text:p text:style-name="P18"><text:span text:style-name="Source_20_Text">CSS</text:span></text:p>
      <text:p text:style-name="P18"><text:span text:style-name="Source_20_Text">JavaScript</text:span></text:p>
      <text:p text:style-name="Text_20_body">Browser Engine:</text:p>
      <text:list text:style-name="L67">
        <text:list-item>
          <text:p text:style-name="P74">HTML পড়ে</text:p>
        </text:list-item>
        <text:list-item>
          <text:p text:style-name="P74">CSS Apply করে</text:p>
        </text:list-item>
        <text:list-item>
          <text:p text:style-name="P74">JavaScript Execute করে</text:p>
        </text:list-item>
        <text:list-item>
          <text:p text:style-name="P74">Final Page Render করে</text:p>
        </text:list-item>
      </text:list>
      <text:p text:style-name="P16"/>
      <text:h text:style-name="P19" text:outline-level="2"><text:soft-page-break/>Browser Engine Architecture</text:h>
      <text:p text:style-name="P18"><text:span text:style-name="Source_20_Text">Browser Engine</text:span></text:p>
      <text:p text:style-name="P18"><text:span text:style-name="Source_20_Text"><text:s text:c="6"/>│</text:span></text:p>
      <text:p text:style-name="P18"><text:span text:style-name="Source_20_Text"><text:s text:c="6"/>├── Rendering Engine</text:span></text:p>
      <text:p text:style-name="P18"><text:span text:style-name="Source_20_Text"><text:s text:c="6"/>├── JavaScript Engine</text:span></text:p>
      <text:p text:style-name="P18"><text:span text:style-name="Source_20_Text"><text:s text:c="6"/>├── Networking</text:span></text:p>
      <text:p text:style-name="P18"><text:span text:style-name="Source_20_Text"><text:s text:c="6"/>├── UI Backend</text:span></text:p>
      <text:p text:style-name="P18"><text:span text:style-name="Source_20_Text"><text:s text:c="6"/>└── Storage</text:span></text:p>
      <text:p text:style-name="P16"/>
      <text:h text:style-name="P19" text:outline-level="2">জনপ্রিয় Browser Engine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Browser</text:p>
            </table:table-cell>
            <table:table-cell table:style-name="Table7.A1" office:value-type="string">
              <text:p text:style-name="Table_20_Heading">Engine</text:p>
            </table:table-cell>
          </table:table-row>
        </table:table-header-rows>
        <table:table-row>
          <table:table-cell table:style-name="Table7.A1" office:value-type="string">
            <text:p text:style-name="Table_20_Contents">Chrome</text:p>
          </table:table-cell>
          <table:table-cell table:style-name="Table7.A1" office:value-type="string">
            <text:p text:style-name="Table_20_Contents">Blink</text:p>
          </table:table-cell>
        </table:table-row>
        <table:table-row>
          <table:table-cell table:style-name="Table7.A1" office:value-type="string">
            <text:p text:style-name="Table_20_Contents">Edge</text:p>
          </table:table-cell>
          <table:table-cell table:style-name="Table7.A1" office:value-type="string">
            <text:p text:style-name="Table_20_Contents">Blink</text:p>
          </table:table-cell>
        </table:table-row>
        <table:table-row>
          <table:table-cell table:style-name="Table7.A1" office:value-type="string">
            <text:p text:style-name="Table_20_Contents">Opera</text:p>
          </table:table-cell>
          <table:table-cell table:style-name="Table7.A1" office:value-type="string">
            <text:p text:style-name="Table_20_Contents">Blink</text:p>
          </table:table-cell>
        </table:table-row>
        <table:table-row>
          <table:table-cell table:style-name="Table7.A1" office:value-type="string">
            <text:p text:style-name="Table_20_Contents">Safari</text:p>
          </table:table-cell>
          <table:table-cell table:style-name="Table7.A1" office:value-type="string">
            <text:p text:style-name="Table_20_Contents">WebKit</text:p>
          </table:table-cell>
        </table:table-row>
        <table:table-row>
          <table:table-cell table:style-name="Table7.A1" office:value-type="string">
            <text:p text:style-name="Table_20_Contents">Firefox</text:p>
          </table:table-cell>
          <table:table-cell table:style-name="Table7.A1" office:value-type="string">
            <text:p text:style-name="Table_20_Contents">Gecko</text:p>
          </table:table-cell>
        </table:table-row>
      </table:table>
      <text:p text:style-name="P16"/>
      <text:h text:style-name="P19" text:outline-level="2">Blink কী?</text:h>
      <text:p text:style-name="Text_20_body">Blink হলো Chrome ও Edge-এর Rendering Engine।</text:p>
      <text:p text:style-name="Text_20_body">এর কাজ:</text:p>
      <text:list text:style-name="L68">
        <text:list-item>
          <text:p text:style-name="P75">HTML Render করা</text:p>
        </text:list-item>
        <text:list-item>
          <text:p text:style-name="P75">CSS Render করা</text:p>
        </text:list-item>
        <text:list-item>
          <text:p text:style-name="P75">DOM Update করা</text:p>
        </text:list-item>
      </text:list>
      <text:p text:style-name="P16"/>
      <text:h text:style-name="P15" text:outline-level="1">JavaScript Engine</text:h>
      <text:p text:style-name="P16"/>
      <text:h text:style-name="P19" text:outline-level="2">JavaScript Engine কী?</text:h>
      <text:p text:style-name="Text_20_body">JavaScript Engine হলো Browser-এর ভেতরের Software Component যা JavaScript Code Execute করে।</text:p>
      <text:p text:style-name="P16"/>
      <text:h text:style-name="P19" text:outline-level="2">JavaScript Engine-এর কাজ</text:h>
      <text:p text:style-name="Text_20_body">ধরুন:</text:p>
      <text:p text:style-name="P18"><text:soft-page-break/><text:span text:style-name="Source_20_Text">let x = 10;</text:span></text:p>
      <text:p text:style-name="P18"><text:span text:style-name="Source_20_Text">let y = 20;</text:span></text:p>
      <text:p text:style-name="P18"/>
      <text:p text:style-name="P18"><text:span text:style-name="Source_20_Text">console.log(x + y);</text:span></text:p>
      <text:p text:style-name="Text_20_body">Engine:</text:p>
      <text:list text:style-name="L69">
        <text:list-item>
          <text:p text:style-name="P76">Code Parse করে</text:p>
        </text:list-item>
        <text:list-item>
          <text:p text:style-name="P76">Syntax Check করে</text:p>
        </text:list-item>
        <text:list-item>
          <text:p text:style-name="P76">Memory Allocate করে</text:p>
        </text:list-item>
        <text:list-item>
          <text:p text:style-name="P76">Execute করে</text:p>
        </text:list-item>
      </text:list>
      <text:p text:style-name="P16"/>
      <text:h text:style-name="P19" text:outline-level="2">JavaScript Engine-এর প্রধান অংশ</text:h>
      <text:p text:style-name="P18"><text:span text:style-name="Source_20_Text">JavaScript Engine</text:span></text:p>
      <text:p text:style-name="P18"/>
      <text:p text:style-name="P18"><text:span text:style-name="Source_20_Text"><text:s text:c="6"/>│</text:span></text:p>
      <text:p text:style-name="P18"><text:span text:style-name="Source_20_Text"><text:s text:c="6"/>├── Parser</text:span></text:p>
      <text:p text:style-name="P18"><text:span text:style-name="Source_20_Text"><text:s text:c="6"/>├── Compiler</text:span></text:p>
      <text:p text:style-name="P18"><text:span text:style-name="Source_20_Text"><text:s text:c="6"/>├── Optimizer</text:span></text:p>
      <text:p text:style-name="P18"><text:span text:style-name="Source_20_Text"><text:s text:c="6"/>└── Memory Manager</text:span></text:p>
      <text:p text:style-name="P16"/>
      <text:h text:style-name="P17" text:outline-level="3">Parser</text:h>
      <text:p text:style-name="Text_20_body">Code পড়ে।</text:p>
      <text:p text:style-name="P16"/>
      <text:h text:style-name="P17" text:outline-level="3">Compiler</text:h>
      <text:p text:style-name="Text_20_body">Machine Understandable Form-এ রূপান্তর করে।</text:p>
      <text:p text:style-name="P16"/>
      <text:h text:style-name="P17" text:outline-level="3">Optimizer</text:h>
      <text:p text:style-name="Text_20_body">Code Faster Run করায়।</text:p>
      <text:p text:style-name="P16"/>
      <text:h text:style-name="P17" text:outline-level="3">Memory Manager</text:h>
      <text:p text:style-name="Text_20_body">Memory Allocate এবং Free করে।</text:p>
      <text:p text:style-name="P16"/>
      <text:h text:style-name="P15" text:outline-level="1"><text:soft-page-break/>V8 Engine</text:h>
      <text:p text:style-name="P16"/>
      <text:h text:style-name="P19" text:outline-level="2">V8 কী?</text:h>
      <text:p text:style-name="Text_20_body">V8</text:p>
      <text:p text:style-name="Text_20_body">Google-এর তৈরি JavaScript Engine।</text:p>
      <text:p text:style-name="P16"/>
      <text:h text:style-name="P19" text:outline-level="2">কোথায় ব্যবহৃত হয়?</text:h>
      <text:h text:style-name="P17" text:outline-level="3">Browser</text:h>
      <text:list text:style-name="L70">
        <text:list-item>
          <text:p text:style-name="P77">Google Chrome</text:p>
        </text:list-item>
        <text:list-item>
          <text:p text:style-name="P77">Microsoft Edge</text:p>
        </text:list-item>
      </text:list>
      <text:p text:style-name="P16"/>
      <text:h text:style-name="P17" text:outline-level="3">Server Side</text:h>
      <text:list text:style-name="L71">
        <text:list-item>
          <text:p text:style-name="P78">Node.js</text:p>
        </text:list-item>
      </text:list>
      <text:p text:style-name="P16"/>
      <text:h text:style-name="P19" text:outline-level="2">V8 কেন জনপ্রিয়?</text:h>
      <text:p text:style-name="Text_20_body">কারণ এটি JavaScript-কে অত্যন্ত দ্রুত Execute করে।</text:p>
      <text:p text:style-name="P16"/>
      <text:h text:style-name="P19" text:outline-level="2">V8 কীভাবে কাজ করে?</text:h>
      <text:p text:style-name="Text_20_body">আগে JavaScript সাধারণত Interpreted ছিল।</text:p>
      <text:p text:style-name="Text_20_body">V8 প্রথম জনপ্রিয়ভাবে:</text:p>
      <text:h text:style-name="P17" text:outline-level="3">Just-In-Time (JIT) Compilation</text:h>
      <text:p text:style-name="Text_20_body">ব্যবহার করে।</text:p>
      <text:p text:style-name="P16"/>
      <text:h text:style-name="P19" text:outline-level="2">JIT Compilation কী?</text:h>
      <text:p text:style-name="P79"><text:span text:style-name="Source_20_Text">JavaScript Code <text:s/>▶️ <text:s text:c="2"/>Compiler <text:s text:c="3"/>▶️ <text:s text:c="2"/>Machine Code <text:s text:c="2"/>▶️ <text:s text:c="3"/>CPU Execute</text:span></text:p>
      <text:p text:style-name="P18"><text:span text:style-name="Source_20_Text"><text:s text:c="8"/></text:span></text:p>
      <text:p text:style-name="P79">ফলে Execution অনেক দ্রুত হয়।</text:p>
      <text:p text:style-name="P79"/>
      <text:p text:style-name="P79"/>
      <text:p text:style-name="P79"/>
      <text:p text:style-name="P16"><text:soft-page-break/></text:p>
      <text:h text:style-name="P19" text:outline-level="2">V8-এর সুবিধা</text:h>
      <text:h text:style-name="P17" text:outline-level="3">Fast Execution</text:h>
      <text:p text:style-name="Text_20_body">Machine Code-এ Compile করে।</text:p>
      <text:p text:style-name="P16"/>
      <text:h text:style-name="P17" text:outline-level="3">Memory Optimization</text:h>
      <text:p text:style-name="Text_20_body">Garbage Collection করে।</text:p>
      <text:p text:style-name="P16"/>
      <text:h text:style-name="P17" text:outline-level="3">Node.js Support</text:h>
      <text:p text:style-name="Text_20_body">Backend Development সম্ভব করেছে।</text:p>
      <text:p text:style-name="P16"/>
      <text:h text:style-name="P15" text:outline-level="1">SpiderMonkey</text:h>
      <text:p text:style-name="P16"/>
      <text:h text:style-name="P19" text:outline-level="2">SpiderMonkey কী?</text:h>
      <text:p text:style-name="Text_20_body">SpiderMonkey</text:p>
      <text:p text:style-name="Text_20_body">Mozilla-এর তৈরি JavaScript Engine।</text:p>
      <text:p text:style-name="P16"/>
      <text:h text:style-name="P19" text:outline-level="2">কোথায় ব্যবহৃত হয়?</text:h>
      <text:h text:style-name="P17" text:outline-level="3">Mozilla Firefox</text:h>
      <text:p text:style-name="P16"/>
      <text:h text:style-name="P19" text:outline-level="2">ইতিহাস</text:h>
      <text:p text:style-name="Text_20_body">SpiderMonkey ছিল বিশ্বের প্রথম JavaScript Engine-গুলোর একটি।</text:p>
      <text:p text:style-name="Text_20_body">Brendan Eich নিজেই এর প্রাথমিক সংস্করণের সাথে যুক্ত ছিলেন।</text:p>
      <text:p text:style-name="P16"/>
      <text:h text:style-name="P19" text:outline-level="2">SpiderMonkey-এর কাজ</text:h>
      <text:p text:style-name="Text_20_body">V8-এর মতোই:</text:p>
      <text:list text:style-name="L72">
        <text:list-item>
          <text:p text:style-name="P80">Parse</text:p>
        </text:list-item>
        <text:list-item>
          <text:p text:style-name="P80">Compile</text:p>
        </text:list-item>
        <text:list-item>
          <text:p text:style-name="P80">Execute</text:p>
        </text:list-item>
      </text:list>
      <text:p text:style-name="Text_20_body"><text:soft-page-break/>করে।</text:p>
      <text:p text:style-name="P16"/>
      <text:h text:style-name="P15" text:outline-level="1">অন্যান্য JavaScript Engine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Engine</text:p>
            </table:table-cell>
            <table:table-cell table:style-name="Table8.A1" office:value-type="string">
              <text:p text:style-name="Table_20_Heading">Browser</text:p>
            </table:table-cell>
          </table:table-row>
        </table:table-header-rows>
        <table:table-row>
          <table:table-cell table:style-name="Table8.A1" office:value-type="string">
            <text:p text:style-name="Table_20_Contents">V8</text:p>
          </table:table-cell>
          <table:table-cell table:style-name="Table8.A1" office:value-type="string">
            <text:p text:style-name="Table_20_Contents">Chrome, Edge</text:p>
          </table:table-cell>
        </table:table-row>
        <table:table-row>
          <table:table-cell table:style-name="Table8.A1" office:value-type="string">
            <text:p text:style-name="Table_20_Contents">SpiderMonkey</text:p>
          </table:table-cell>
          <table:table-cell table:style-name="Table8.A1" office:value-type="string">
            <text:p text:style-name="Table_20_Contents">Firefox</text:p>
          </table:table-cell>
        </table:table-row>
        <table:table-row>
          <table:table-cell table:style-name="Table8.A1" office:value-type="string">
            <text:p text:style-name="Table_20_Contents">JavaScriptCore</text:p>
          </table:table-cell>
          <table:table-cell table:style-name="Table8.A1" office:value-type="string">
            <text:p text:style-name="Table_20_Contents">Safari</text:p>
          </table:table-cell>
        </table:table-row>
        <table:table-row>
          <table:table-cell table:style-name="Table8.A1" office:value-type="string">
            <text:p text:style-name="Table_20_Contents">Chakra (পুরনো)</text:p>
          </table:table-cell>
          <table:table-cell table:style-name="Table8.A1" office:value-type="string">
            <text:p text:style-name="Table_20_Contents">Legacy Edge</text:p>
          </table:table-cell>
        </table:table-row>
      </table:table>
      <text:p text:style-name="P16"/>
      <text:h text:style-name="P15" text:outline-level="1">JavaScript Execution Process</text:h>
      <text:p text:style-name="Text_20_body">এটি Interview-এর জন্য খুব গুরুত্বপূর্ণ।</text:p>
      <text:p text:style-name="P16"/>
      <text:h text:style-name="P19" text:outline-level="2">Step 1: Source Code</text:h>
      <text:p text:style-name="Text_20_body">Developer Code লেখে।</text:p>
      <text:p text:style-name="P18"><text:span text:style-name="Source_20_Text">let a = 10;</text:span></text:p>
      <text:p text:style-name="P18"><text:span text:style-name="Source_20_Text">let b = 20;</text:span></text:p>
      <text:p text:style-name="P18"/>
      <text:p text:style-name="P18"><text:span text:style-name="Source_20_Text">console.log(a + b);</text:span></text:p>
      <text:p text:style-name="P16"/>
      <text:h text:style-name="P19" text:outline-level="2">Step 2: Parsing</text:h>
      <text:p text:style-name="Text_20_body">Engine Code Parse করে।</text:p>
      <text:p text:style-name="P18"><text:span text:style-name="Source_20_Text">Characters</text:span></text:p>
      <text:p text:style-name="P18"><text:span text:style-name="Source_20_Text"><text:s text:c="6"/>▼</text:span></text:p>
      <text:p text:style-name="P18"><text:span text:style-name="Source_20_Text">Tokens</text:span></text:p>
      <text:p text:style-name="P18"><text:span text:style-name="Source_20_Text"><text:s text:c="6"/>▼</text:span></text:p>
      <text:p text:style-name="P18"><text:span text:style-name="Source_20_Text">Syntax Tree</text:span></text:p>
      <text:p text:style-name="P16"/>
      <text:h text:style-name="P19" text:outline-level="2">Abstract Syntax Tree (AST)</text:h>
      <text:p text:style-name="Text_20_body">Engine Code-কে Tree Structure-এ রূপান্তর করে।</text:p>
      <text:p text:style-name="P18"><text:span text:style-name="Source_20_Text"><text:s text:c="6"/>+</text:span></text:p>
      <text:p text:style-name="P18"><text:span text:style-name="Source_20_Text"><text:s text:c="5"/>/ \</text:span></text:p>
      <text:p text:style-name="P18"><text:span text:style-name="Source_20_Text"><text:s text:c="3"/>10 <text:s/>20</text:span></text:p>
      <text:p text:style-name="P16"><text:soft-page-break/></text:p>
      <text:h text:style-name="P19" text:outline-level="2">Step 3: Compilation</text:h>
      <text:p text:style-name="Text_20_body">Engine Code Optimize করে।</text:p>
      <text:p text:style-name="P16"/>
      <text:h text:style-name="P19" text:outline-level="2">Step 4: Memory Allocation</text:h>
      <text:p text:style-name="Text_20_body">Variables-এর জন্য Memory তৈরি হয়।</text:p>
      <text:p text:style-name="P18"><text:span text:style-name="Source_20_Text">let a = 10;</text:span></text:p>
      <text:p text:style-name="Text_20_body">Memory:</text:p>
      <text:p text:style-name="P18"><text:span text:style-name="Source_20_Text">a = 10</text:span></text:p>
      <text:p text:style-name="P16"/>
      <text:h text:style-name="P19" text:outline-level="2">Step 5: Execution</text:h>
      <text:p text:style-name="Text_20_body">Code Execute হয়।</text:p>
      <text:p text:style-name="P16"/>
      <text:h text:style-name="P19" text:outline-level="2">Step 6: Output</text:h>
      <text:p text:style-name="P18"><text:span text:style-name="Source_20_Text">console.log(30);</text:span></text:p>
      <text:p text:style-name="Text_20_body">Console-এ Output দেখায়।</text:p>
      <text:p text:style-name="P16"/>
      <text:h text:style-name="P15" text:outline-level="1">Execution Process Flow Diagram</text:h>
      <text:p text:style-name="P18"><text:span text:style-name="Source_20_Text">JavaScript Source Code</text:span></text:p>
      <text:p text:style-name="P18"><text:span text:style-name="Source_20_Text"><text:s text:c="10"/>▼</text:span></text:p>
      <text:p text:style-name="P18"><text:span text:style-name="Source_20_Text"><text:s text:c="8"/>Parser</text:span></text:p>
      <text:p text:style-name="P18"><text:span text:style-name="Source_20_Text"><text:s text:c="10"/>▼</text:span></text:p>
      <text:p text:style-name="P18"><text:span text:style-name="Source_20_Text"><text:s text:c="9"/>AST</text:span></text:p>
      <text:p text:style-name="P18"><text:span text:style-name="Source_20_Text"><text:s text:c="10"/>▼</text:span></text:p>
      <text:p text:style-name="P18"><text:span text:style-name="Source_20_Text"><text:s text:c="6"/>Compiler</text:span></text:p>
      <text:p text:style-name="P18"><text:span text:style-name="Source_20_Text"><text:s text:c="10"/>▼</text:span></text:p>
      <text:p text:style-name="P18"><text:span text:style-name="Source_20_Text"><text:s text:c="5"/>Machine Code</text:span></text:p>
      <text:p text:style-name="P18"><text:span text:style-name="Source_20_Text"><text:s text:c="10"/>▼</text:span></text:p>
      <text:p text:style-name="P18"><text:span text:style-name="Source_20_Text"><text:s text:c="6"/>Execution</text:span></text:p>
      <text:p text:style-name="P18"><text:span text:style-name="Source_20_Text"><text:s text:c="10"/>▼</text:span></text:p>
      <text:p text:style-name="P18"><text:span text:style-name="Source_20_Text"><text:s text:c="8"/>Output</text:span></text:p>
      <text:p text:style-name="P16"><text:soft-page-break/></text:p>
      <text:h text:style-name="P15" text:outline-level="1">Memory Management</text:h>
      <text:p text:style-name="P16"/>
      <text:h text:style-name="P19" text:outline-level="2">Automatic Memory Management</text:h>
      <text:p text:style-name="Text_20_body">JavaScript-এ Memory Manually Free করতে হয় না।</text:p>
      <text:p text:style-name="P16"/>
      <text:h text:style-name="P19" text:outline-level="2">Garbage Collection</text:h>
      <text:p text:style-name="Text_20_body">Engine নিজে Unused Memory Remove করে।</text:p>
      <text:p text:style-name="Text_20_body">উদাহরণ:</text:p>
      <text:p text:style-name="P18"><text:span text:style-name="Source_20_Text">let name = "Shuvo";</text:span></text:p>
      <text:p text:style-name="P18"/>
      <text:p text:style-name="P18"><text:span text:style-name="Source_20_Text">name = null;</text:span></text:p>
      <text:p text:style-name="Text_20_body">Unused Memory পরে Remove হয়ে যাবে।</text:p>
      <text:p text:style-name="P16"/>
      <text:h text:style-name="P15" text:outline-level="1">Browser Runtime vs JavaScript Engine</text:h>
      <text:p text:style-name="Text_20_body">অনেকেই এই দুটি বিষয় গুলিয়ে ফেলে।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Browser Runtime</text:p>
            </table:table-cell>
            <table:table-cell table:style-name="Table9.A1" office:value-type="string">
              <text:p text:style-name="Table_20_Heading">JavaScript Engine</text:p>
            </table:table-cell>
          </table:table-row>
        </table:table-header-rows>
        <table:table-row>
          <table:table-cell table:style-name="Table9.A1" office:value-type="string">
            <text:p text:style-name="Table_20_Contents">পুরো Environment</text:p>
          </table:table-cell>
          <table:table-cell table:style-name="Table9.A1" office:value-type="string">
            <text:p text:style-name="Table_20_Contents">Code Executor</text:p>
          </table:table-cell>
        </table:table-row>
        <table:table-row>
          <table:table-cell table:style-name="Table9.A1" office:value-type="string">
            <text:p text:style-name="Table_20_Contents">DOM দেয়</text:p>
          </table:table-cell>
          <table:table-cell table:style-name="Table9.A1" office:value-type="string">
            <text:p text:style-name="Table_20_Contents">Code Run করে</text:p>
          </table:table-cell>
        </table:table-row>
        <table:table-row>
          <table:table-cell table:style-name="Table9.A1" office:value-type="string">
            <text:p text:style-name="Table_20_Contents">Event System দেয়</text:p>
          </table:table-cell>
          <table:table-cell table:style-name="Table9.A1" office:value-type="string">
            <text:p text:style-name="Table_20_Contents">Parse করে</text:p>
          </table:table-cell>
        </table:table-row>
        <table:table-row>
          <table:table-cell table:style-name="Table9.A1" office:value-type="string">
            <text:p text:style-name="Table_20_Contents">Local Storage দেয়</text:p>
          </table:table-cell>
          <table:table-cell table:style-name="Table9.A1" office:value-type="string">
            <text:p text:style-name="Table_20_Contents">Compile করে</text:p>
          </table:table-cell>
        </table:table-row>
        <table:table-row>
          <table:table-cell table:style-name="Table9.A1" office:value-type="string">
            <text:p text:style-name="Table_20_Contents">Fetch API দেয়</text:p>
          </table:table-cell>
          <table:table-cell table:style-name="Table9.A1" office:value-type="string">
            <text:p text:style-name="Table_20_Contents">Execute করে</text:p>
          </table:table-cell>
        </table:table-row>
      </table:table>
      <text:p text:style-name="P16"/>
      <text:h text:style-name="P15" text:outline-level="1">.NET Developer Perspective</text:h>
      <text:p text:style-name="Text_20_body">আপনার C# Background থেকে তুলনা করলে: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JavaScript</text:p>
            </table:table-cell>
            <table:table-cell table:style-name="Table10.A1" office:value-type="string">
              <text:p text:style-name="Table_20_Heading">.NET</text:p>
            </table:table-cell>
          </table:table-row>
        </table:table-header-rows>
        <table:table-row>
          <table:table-cell table:style-name="Table10.A1" office:value-type="string">
            <text:p text:style-name="Table_20_Contents">V8 Engine</text:p>
          </table:table-cell>
          <table:table-cell table:style-name="Table10.A1" office:value-type="string">
            <text:p text:style-name="Table_20_Contents">CLR (Common Language Runtime)</text:p>
          </table:table-cell>
        </table:table-row>
        <table:table-row>
          <table:table-cell table:style-name="Table10.A1" office:value-type="string">
            <text:p text:style-name="Table_20_Contents">JavaScript Code</text:p>
          </table:table-cell>
          <table:table-cell table:style-name="Table10.A1" office:value-type="string">
            <text:p text:style-name="Table_20_Contents">C# Code</text:p>
          </table:table-cell>
        </table:table-row>
        <table:table-row>
          <table:table-cell table:style-name="Table10.A1" office:value-type="string">
            <text:p text:style-name="Table_20_Contents">JIT Compiler</text:p>
          </table:table-cell>
          <table:table-cell table:style-name="Table10.A1" office:value-type="string">
            <text:p text:style-name="Table_20_Contents">JIT Compiler</text:p>
          </table:table-cell>
        </table:table-row>
        <table:table-row>
          <table:table-cell table:style-name="Table10.A1" office:value-type="string">
            <text:p text:style-name="Table_20_Contents">Runtime Environment</text:p>
          </table:table-cell>
          <table:table-cell table:style-name="Table10.A1" office:value-type="string">
            <text:p text:style-name="Table_20_Contents">.NET Runtime</text:p>
          </table:table-cell>
        </table:table-row>
        <table:table-row>
          <table:table-cell table:style-name="Table10.A1" office:value-type="string">
            <text:p text:style-name="Table_20_Contents">Garbage Collector</text:p>
          </table:table-cell>
          <table:table-cell table:style-name="Table10.A1" office:value-type="string">
            <text:p text:style-name="Table_20_Contents">Garbage Collector</text:p>
          </table:table-cell>
        </table:table-row>
      </table:table>
      <text:p text:style-name="Text_20_body">তাই V8 Engine-কে অনেকটা CLR-এর JavaScript Version হিসেবে ভাবতে পারেন।</text:p>
      <text:p text:style-name="P16"><text:soft-page-break/></text:p>
      <text:h text:style-name="P15" text:outline-level="1">Summary</text:h>
      <text:p text:style-name="Text_20_body">এই অধ্যায় থেকে যা শিখলাম:</text:p>
      <text:p text:style-name="Text_20_body">✅ JavaScript Runtime Environment Code Execute করার Environment প্রদান করে।</text:p>
      <text:p text:style-name="Text_20_body">✅ Browser Engine HTML, CSS এবং JavaScript Process করে।</text:p>
      <text:p text:style-name="Text_20_body">✅ JavaScript Engine Code Parse, Compile এবং Execute করে।</text:p>
      <text:p text:style-name="Text_20_body">✅ V8 হলো Google-এর JavaScript Engine।</text:p>
      <text:p text:style-name="Text_20_body">✅ SpiderMonkey হলো Mozilla-এর JavaScript Engine।</text:p>
      <text:p text:style-name="Text_20_body">✅ V8 JIT Compilation ব্যবহার করে দ্রুত Execution নিশ্চিত করে।</text:p>
      <text:p text:style-name="Text_20_body">✅ JavaScript Execution Process: Parse → AST → Compile → Execute → Output।</text:p>
      <text:p text:style-name="Text_20_body">✅ JavaScript Automatic Memory Management এবং Garbage Collection ব্যবহার করে।</text:p>
      <text:p text:style-name="P16"/>
      <text:h text:style-name="P15" text:outline-level="1">Interview Questions</text:h>
      <text:list text:style-name="L73">
        <text:list-item>
          <text:p text:style-name="P81">JavaScript Runtime Environment কী?</text:p>
        </text:list-item>
        <text:list-item>
          <text:p text:style-name="P81">Browser Engine কী?</text:p>
        </text:list-item>
        <text:list-item>
          <text:p text:style-name="P81">JavaScript Engine কী?</text:p>
        </text:list-item>
        <text:list-item>
          <text:p text:style-name="P81">V8 Engine কী এবং কোথায় ব্যবহৃত হয়?</text:p>
        </text:list-item>
        <text:list-item>
          <text:p text:style-name="P81">SpiderMonkey কী?</text:p>
        </text:list-item>
        <text:list-item>
          <text:p text:style-name="P81">JIT Compilation কী?</text:p>
        </text:list-item>
        <text:list-item>
          <text:p text:style-name="P81">AST (Abstract Syntax Tree) কী?</text:p>
        </text:list-item>
        <text:list-item>
          <text:p text:style-name="P81">JavaScript Code Execution Process ব্যাখ্যা করুন।</text:p>
        </text:list-item>
        <text:list-item>
          <text:p text:style-name="P81">Browser Runtime এবং JavaScript Engine-এর মধ্যে পার্থক্য কী?</text:p>
        </text:list-item>
        <text:list-item>
          <text:p text:style-name="P81">V8 Engine কীভাবে JavaScript-এর Performance বাড়ায়?</text:p>
        </text:list-item>
        <text:list-item>
          <text:p text:style-name="P81">Garbage Collection কী?</text:p>
        </text:list-item>
        <text:list-item>
          <text:p text:style-name="P81">JavaScript Memory Management কীভাবে কাজ করে?</text:p>
        </text:list-item>
      </text:list>
      <text:p text:style-name="Text_20_body"/>
      <text:p text:style-name="Text_20_body"/>
      <text:p text:style-name="Text_20_body"/>
      <text:p text:style-name="Text_20_body"/>
      <text:h text:style-name="P15" text:outline-level="1"><text:soft-page-break/>Step 6: Installing Development Tools</text:h>
      <text:p text:style-name="P16"/>
      <text:h text:style-name="P15" text:outline-level="1">ভূমিকা</text:h>
      <text:p text:style-name="Text_20_body">JavaScript শেখার জন্য শুধু Language জানলেই হয় না। একজন Professional JavaScript Developer-এর কাজের পরিবেশ (Development Environment) তৈরি করার জন্য কিছু গুরুত্বপূর্ণ Tool ব্যবহার করতে হয়।</text:p>
      <text:p text:style-name="Text_20_body">এই Tools গুলো আপনাকে সাহায্য করবে:</text:p>
      <text:list text:style-name="L74">
        <text:list-item>
          <text:p text:style-name="P82">Code লিখতে</text:p>
        </text:list-item>
        <text:list-item>
          <text:p text:style-name="P82">Debug করতে</text:p>
        </text:list-item>
        <text:list-item>
          <text:p text:style-name="P82">Package Install করতে</text:p>
        </text:list-item>
        <text:list-item>
          <text:p text:style-name="P82">Version Control করতে</text:p>
        </text:list-item>
        <text:list-item>
          <text:p text:style-name="P82">Project Deploy করতে</text:p>
        </text:list-item>
        <text:list-item>
          <text:p text:style-name="P82">Team Collaboration করতে</text:p>
        </text:list-item>
      </text:list>
      <text:p text:style-name="P16"/>
      <text:h text:style-name="P15" text:outline-level="1">Development Environment Overview</text:h>
      <text:p text:style-name="Text_20_body">একজন JavaScript Developer সাধারণত নিচের Tools ব্যবহার করেন:</text:p>
      <text:p text:style-name="P18"><text:span text:style-name="Source_20_Text">VS Code</text:span></text:p>
      <text:p text:style-name="P18"><text:span text:style-name="Source_20_Text"><text:s text:c="4"/>↓</text:span></text:p>
      <text:p text:style-name="P18"><text:span text:style-name="Source_20_Text">Code Editor</text:span></text:p>
      <text:p text:style-name="P18"/>
      <text:p text:style-name="P18"><text:span text:style-name="Source_20_Text">Browser DevTools</text:span></text:p>
      <text:p text:style-name="P18"><text:span text:style-name="Source_20_Text"><text:s text:c="4"/>↓</text:span></text:p>
      <text:p text:style-name="P18"><text:span text:style-name="Source_20_Text">Debugging</text:span></text:p>
      <text:p text:style-name="P18"/>
      <text:p text:style-name="P18"><text:span text:style-name="Source_20_Text">Node.js</text:span></text:p>
      <text:p text:style-name="P18"><text:span text:style-name="Source_20_Text"><text:s text:c="4"/>↓</text:span></text:p>
      <text:p text:style-name="P18"><text:span text:style-name="Source_20_Text">Runtime</text:span></text:p>
      <text:p text:style-name="P18"/>
      <text:p text:style-name="P18"><text:span text:style-name="Source_20_Text">npm</text:span></text:p>
      <text:p text:style-name="P18"><text:span text:style-name="Source_20_Text"><text:s text:c="4"/>↓</text:span></text:p>
      <text:p text:style-name="P18"><text:span text:style-name="Source_20_Text">Package Manager</text:span></text:p>
      <text:p text:style-name="P18"><text:soft-page-break/></text:p>
      <text:p text:style-name="P18"><text:span text:style-name="Source_20_Text">Git</text:span></text:p>
      <text:p text:style-name="P18"><text:span text:style-name="Source_20_Text"><text:s text:c="4"/>↓</text:span></text:p>
      <text:p text:style-name="P18"><text:span text:style-name="Source_20_Text">Version Control</text:span></text:p>
      <text:p text:style-name="P18"/>
      <text:p text:style-name="P18"><text:span text:style-name="Source_20_Text">GitHub</text:span></text:p>
      <text:p text:style-name="P18"><text:span text:style-name="Source_20_Text"><text:s text:c="4"/>↓</text:span></text:p>
      <text:p text:style-name="P18"><text:span text:style-name="Source_20_Text">Code Hosting</text:span></text:p>
      <text:p text:style-name="P16"/>
      <text:h text:style-name="P15" text:outline-level="1">1. VS Code</text:h>
      <text:h text:style-name="P19" text:outline-level="2">VS Code কী?</text:h>
      <text:p text:style-name="Text_20_body">Visual Studio Code হলো Microsoft-এর তৈরি একটি Lightweight কিন্তু অত্যন্ত শক্তিশালী Code Editor।</text:p>
      <text:p text:style-name="P16"/>
      <text:h text:style-name="P19" text:outline-level="2">VS Code কেন জনপ্রিয়?</text:h>
      <text:h text:style-name="P17" text:outline-level="3">Free</text:h>
      <text:p text:style-name="Text_20_body">সম্পূর্ণ বিনামূল্যে।</text:p>
      <text:p text:style-name="P16"/>
      <text:h text:style-name="P17" text:outline-level="3">Lightweight</text:h>
      <text:p text:style-name="Text_20_body">Visual Studio-এর তুলনায় দ্রুত Start হয়।</text:p>
      <text:p text:style-name="P16"/>
      <text:h text:style-name="P17" text:outline-level="3">Multi Language Support</text:h>
      <text:list text:style-name="L75">
        <text:list-item>
          <text:p text:style-name="P83">JavaScript</text:p>
        </text:list-item>
        <text:list-item>
          <text:p text:style-name="P83">TypeScript</text:p>
        </text:list-item>
        <text:list-item>
          <text:p text:style-name="P83">C#</text:p>
        </text:list-item>
        <text:list-item>
          <text:p text:style-name="P83">Python</text:p>
        </text:list-item>
        <text:list-item>
          <text:p text:style-name="P83">Java</text:p>
        </text:list-item>
        <text:list-item>
          <text:p text:style-name="P83">PHP</text:p>
        </text:list-item>
      </text:list>
      <text:p text:style-name="Text_20_body">সহ অনেক Language Support করে।</text:p>
      <text:h text:style-name="P17" text:outline-level="3">Extension Support</text:h>
      <text:p text:style-name="Text_20_body">হাজার হাজার Extension Install করা যায়।</text:p>
      <text:h text:style-name="P19" text:outline-level="2"><text:soft-page-break/>JavaScript Development-এর জন্য গুরুত্বপূর্ণ Extensions</text:h>
      <text:h text:style-name="P17" text:outline-level="3">ESLint</text:h>
      <text:p text:style-name="Text_20_body">Code Quality Check করে।</text:p>
      <text:p text:style-name="P16"/>
      <text:h text:style-name="P17" text:outline-level="3">Prettier</text:h>
      <text:p text:style-name="Text_20_body">Code Format করে।</text:p>
      <text:p text:style-name="P16"/>
      <text:h text:style-name="P17" text:outline-level="3">JavaScript (ES6) Snippets</text:h>
      <text:p text:style-name="Text_20_body">দ্রুত Code লেখার সুবিধা দেয়।</text:p>
      <text:p text:style-name="P16"/>
      <text:h text:style-name="P17" text:outline-level="3">GitLens</text:h>
      <text:p text:style-name="Text_20_body">Git History সহজে দেখায়।</text:p>
      <text:p text:style-name="P16"/>
      <text:h text:style-name="P17" text:outline-level="3">Live Server</text:h>
      <text:p text:style-name="Text_20_body">Local Website Run করতে সাহায্য করে।</text:p>
      <text:p text:style-name="P16"/>
      <text:h text:style-name="P19" text:outline-level="2">VS Code Installation</text:h>
      <text:p text:style-name="Text_20_body">অফিসিয়াল Website:</text:p>
      <text:p text:style-name="Text_20_body"><text:a xlink:type="simple" xlink:href="https://code.visualstudio.com/?utm_source=chatgpt.com" text:style-name="Internet_20_link" text:visited-style-name="Visited_20_Internet_20_Link">Visual Studio Code</text:a></text:p>
      <text:p text:style-name="P16"/>
      <text:h text:style-name="P19" text:outline-level="2">VS Code-এর গুরুত্বপূর্ণ Panels</text:h>
      <text:h text:style-name="P17" text:outline-level="3">Explorer</text:h>
      <text:p text:style-name="Text_20_body">Project Files দেখায়।</text:p>
      <text:p text:style-name="P16"/>
      <text:h text:style-name="P17" text:outline-level="3">Search</text:h>
      <text:p text:style-name="Text_20_body">Project-wide Search।</text:p>
      <text:p text:style-name="P16"/>
      <text:h text:style-name="P17" text:outline-level="3">Source Control</text:h>
      <text:p text:style-name="Text_20_body">Git Integration।</text:p>
      <text:p text:style-name="P16"/>
      <text:h text:style-name="P17" text:outline-level="3"><text:soft-page-break/>Terminal</text:h>
      <text:p text:style-name="Text_20_body">Command Run করার জন্য।</text:p>
      <text:p text:style-name="P16"/>
      <text:h text:style-name="P17" text:outline-level="3">Extensions</text:h>
      <text:p text:style-name="Text_20_body">নতুন Extension Install করার জন্য।</text:p>
      <text:p text:style-name="P16"/>
      <text:h text:style-name="P15" text:outline-level="1">2. Browser DevTools</text:h>
      <text:p text:style-name="P16"/>
      <text:h text:style-name="P19" text:outline-level="2">Browser DevTools কী?</text:h>
      <text:p text:style-name="Text_20_body">Browser-এর মধ্যে থাকা Built-In Developer Toolkit।</text:p>
      <text:p text:style-name="P16"/>
      <text:h text:style-name="P19" text:outline-level="2">DevTools Open করার Shortcut</text:h>
      <text:h text:style-name="P17" text:outline-level="3">Chrome / Edge</text:h>
      <text:p text:style-name="P18"><text:span text:style-name="Source_20_Text">F12</text:span></text:p>
      <text:p text:style-name="Text_20_body">অথবা</text:p>
      <text:p text:style-name="P18"><text:span text:style-name="Source_20_Text">Ctrl + Shift + I</text:span></text:p>
      <text:p text:style-name="P16"/>
      <text:h text:style-name="P19" text:outline-level="2">Browser DevTools-এর ব্যবহার</text:h>
      <text:h text:style-name="P17" text:outline-level="3">HTML Inspect</text:h>
      <text:p text:style-name="Text_20_body">Page-এর HTML Structure দেখা।</text:p>
      <text:p text:style-name="P16"/>
      <text:h text:style-name="P17" text:outline-level="3">CSS Debugging</text:h>
      <text:p text:style-name="Text_20_body">CSS কোথা থেকে Apply হয়েছে দেখা।</text:p>
      <text:p text:style-name="P16"/>
      <text:h text:style-name="P17" text:outline-level="3">JavaScript Debugging</text:h>
      <text:p text:style-name="Text_20_body">Console Error দেখা।</text:p>
      <text:p text:style-name="P16"/>
      <text:h text:style-name="P17" text:outline-level="3">Network Monitoring</text:h>
      <text:p text:style-name="Text_20_body">API Request Monitor করা।</text:p>
      <text:p text:style-name="P16"/>
      <text:h text:style-name="P19" text:outline-level="2"><text:soft-page-break/>Console Tab</text:h>
      <text:p text:style-name="Text_20_body">JavaScript Test করার জন্য সবচেয়ে বেশি ব্যবহৃত।</text:p>
      <text:p text:style-name="Text_20_body">উদাহরণ:</text:p>
      <text:p text:style-name="P18"><text:span text:style-name="Source_20_Text">console.log("Hello JavaScript");</text:span></text:p>
      <text:p text:style-name="P16"/>
      <text:h text:style-name="P19" text:outline-level="2">Elements Tab</text:h>
      <text:p text:style-name="Text_20_body">HTML এবং CSS Inspect করার জন্য।</text:p>
      <text:p text:style-name="P16"/>
      <text:h text:style-name="P19" text:outline-level="2">Network Tab</text:h>
      <text:p text:style-name="Text_20_body">API Request দেখার জন্য।</text:p>
      <text:p text:style-name="Text_20_body">আপনি ERP Project-এ API Call Debug করতে এটি ব্যবহার করবেন।</text:p>
      <text:p text:style-name="P16"/>
      <text:h text:style-name="P19" text:outline-level="2">Sources Tab</text:h>
      <text:p text:style-name="Text_20_body">JavaScript Debugging এবং Breakpoint Set করার জন্য।</text:p>
      <text:p text:style-name="P16"/>
      <text:h text:style-name="P19" text:outline-level="2">Application Tab</text:h>
      <text:p text:style-name="Text_20_body">দেখতে পারবেন:</text:p>
      <text:list text:style-name="L76">
        <text:list-item>
          <text:p text:style-name="P84">Local Storage</text:p>
        </text:list-item>
        <text:list-item>
          <text:p text:style-name="P84">Session Storage</text:p>
        </text:list-item>
        <text:list-item>
          <text:p text:style-name="P84">Cookies</text:p>
        </text:list-item>
      </text:list>
      <text:p text:style-name="P16"/>
      <text:h text:style-name="P15" text:outline-level="1">3. Node.js</text:h>
      <text:p text:style-name="P16"/>
      <text:h text:style-name="P19" text:outline-level="2">Node.js কী?</text:h>
      <text:p text:style-name="Text_20_body">Node.js হলো Browser-এর বাইরে JavaScript Run করার Runtime Environment।</text:p>
      <text:p text:style-name="P16"/>
      <text:h text:style-name="P19" text:outline-level="2">Node.js কেন তৈরি হয়েছিল?</text:h>
      <text:p text:style-name="Text_20_body">JavaScript প্রথমে শুধুমাত্র Browser-এ চলত।</text:p>
      <text:p text:style-name="Text_20_body">Node.js আসার পরে JavaScript Server Side-এও চলতে শুরু করে।</text:p>
      <text:p text:style-name="P16"><text:soft-page-break/></text:p>
      <text:h text:style-name="P19" text:outline-level="2">Node.js দিয়ে কী করা যায়?</text:h>
      <text:h text:style-name="P17" text:outline-level="3">Backend Development</text:h>
      <text:list text:style-name="L77">
        <text:list-item>
          <text:p text:style-name="P85">API</text:p>
        </text:list-item>
        <text:list-item>
          <text:p text:style-name="P85">Authentication</text:p>
        </text:list-item>
        <text:list-item>
          <text:p text:style-name="P85">Business Logic</text:p>
        </text:list-item>
      </text:list>
      <text:p text:style-name="P16"/>
      <text:h text:style-name="P17" text:outline-level="3">File Handling</text:h>
      <text:p text:style-name="Text_20_body">Server File Read/Write।</text:p>
      <text:p text:style-name="P16"/>
      <text:h text:style-name="P17" text:outline-level="3">Automation Scripts</text:h>
      <text:p text:style-name="Text_20_body">Task Automation।</text:p>
      <text:p text:style-name="P16"/>
      <text:h text:style-name="P17" text:outline-level="3">Real-Time Applications</text:h>
      <text:list text:style-name="L78">
        <text:list-item>
          <text:p text:style-name="P86">Chat Application</text:p>
        </text:list-item>
        <text:list-item>
          <text:p text:style-name="P86">Notification System</text:p>
        </text:list-item>
      </text:list>
      <text:p text:style-name="P16"/>
      <text:h text:style-name="P19" text:outline-level="2">Node.js Installation</text:h>
      <text:p text:style-name="Text_20_body">অফিসিয়াল Website:</text:p>
      <text:p text:style-name="Text_20_body"><text:a xlink:type="simple" xlink:href="https://nodejs.org/?utm_source=chatgpt.com" text:style-name="Internet_20_link" text:visited-style-name="Visited_20_Internet_20_Link">Node.js</text:a></text:p>
      <text:p text:style-name="P16"/>
      <text:h text:style-name="P19" text:outline-level="2">Installation Verify</text:h>
      <text:p text:style-name="Text_20_body">Terminal-এ:</text:p>
      <text:p text:style-name="P18"><text:span text:style-name="Source_20_Text">node -v</text:span></text:p>
      <text:p text:style-name="P16"/>
      <text:h text:style-name="P19" text:outline-level="2">Output</text:h>
      <text:p text:style-name="P18"><text:span text:style-name="Source_20_Text">v24.x.x</text:span></text:p>
      <text:p text:style-name="Text_20_body">(Version সময়ের সাথে পরিবর্তিত হবে)</text:p>
      <text:p text:style-name="P16"/>
      <text:h text:style-name="P19" text:outline-level="2"><text:soft-page-break/>Node REPL</text:h>
      <text:p text:style-name="Text_20_body">Terminal-এ:</text:p>
      <text:p text:style-name="P18"><text:span text:style-name="Source_20_Text">node</text:span></text:p>
      <text:p text:style-name="Text_20_body">তারপর:</text:p>
      <text:p text:style-name="P18"><text:span text:style-name="Source_20_Text">2 + 3</text:span></text:p>
      <text:p text:style-name="Text_20_body">Output:</text:p>
      <text:p text:style-name="P18"><text:span text:style-name="Source_20_Text">5</text:span></text:p>
      <text:p text:style-name="P16"/>
      <text:h text:style-name="P15" text:outline-level="1">4. npm</text:h>
      <text:p text:style-name="P16"/>
      <text:h text:style-name="P19" text:outline-level="2">npm কী?</text:h>
      <text:p text:style-name="Text_20_body">npm হলো Node.js-এর Default Package Manager।</text:p>
      <text:p text:style-name="P16"/>
      <text:h text:style-name="P19" text:outline-level="2">Package Manager কী?</text:h>
      <text:p text:style-name="Text_20_body">JavaScript Project-এর Dependencies Install ও Manage করে।</text:p>
      <text:p text:style-name="P16"/>
      <text:h text:style-name="P19" text:outline-level="2">Dependency কী?</text:h>
      <text:p text:style-name="Text_20_body">যে Library বা Package আপনার Project ব্যবহার করে।</text:p>
      <text:p text:style-name="Text_20_body">উদাহরণ:</text:p>
      <text:p text:style-name="P87"><text:span text:style-name="Source_20_Text">React, Axios, Express, Lodash</text:span></text:p>
      <text:p text:style-name="P16"/>
      <text:h text:style-name="P19" text:outline-level="2">npm Installation</text:h>
      <text:p text:style-name="Text_20_body">Node.js Install করলে npm Automatically Install হয়।</text:p>
      <text:p text:style-name="P16"/>
      <text:h text:style-name="P19" text:outline-level="2">Version Check</text:h>
      <text:p text:style-name="P18"><text:span text:style-name="Source_20_Text">npm -v</text:span></text:p>
      <text:p text:style-name="P16"/>
      <text:h text:style-name="P19" text:outline-level="2">নতুন Project তৈরি</text:h>
      <text:p text:style-name="P18"><text:span text:style-name="Source_20_Text">npm init</text:span></text:p>
      <text:p text:style-name="P16"/>
      <text:h text:style-name="P19" text:outline-level="2"><text:soft-page-break/>Package Install</text:h>
      <text:p text:style-name="P18"><text:span text:style-name="Source_20_Text">npm install axios</text:span></text:p>
      <text:p text:style-name="P16"/>
      <text:h text:style-name="P19" text:outline-level="2">Package Remove</text:h>
      <text:p text:style-name="P18"><text:span text:style-name="Source_20_Text">npm uninstall axios</text:span></text:p>
      <text:p text:style-name="P16"/>
      <text:h text:style-name="P19" text:outline-level="2">package.json</text:h>
      <text:p text:style-name="Text_20_body">JavaScript Project-এর Configuration File।</text:p>
      <text:p text:style-name="Text_20_body">উদাহরণ:</text:p>
      <text:p text:style-name="P18"><text:span text:style-name="Source_20_Text">{</text:span></text:p>
      <text:p text:style-name="P18"><text:span text:style-name="Source_20_Text"><text:s text:c="2"/>"name": "myproject",</text:span></text:p>
      <text:p text:style-name="P18"><text:span text:style-name="Source_20_Text"><text:s text:c="2"/>"version": "1.0.0"</text:span></text:p>
      <text:p text:style-name="P18"><text:span text:style-name="Source_20_Text">}</text:span></text:p>
      <text:p text:style-name="P16"/>
      <text:h text:style-name="P19" text:outline-level="2">package-lock.json</text:h>
      <text:p text:style-name="Text_20_body">Installed Packages-এর Exact Version Store করে।</text:p>
      <text:p text:style-name="P16"/>
      <text:h text:style-name="P15" text:outline-level="1">5. Git</text:h>
      <text:p text:style-name="P16"/>
      <text:h text:style-name="P19" text:outline-level="2">Git কী?</text:h>
      <text:p text:style-name="Text_20_body">Git হলো Distributed Version Control System।</text:p>
      <text:p text:style-name="P16"/>
      <text:h text:style-name="P19" text:outline-level="2">Git কেন দরকার?</text:h>
      <text:p text:style-name="Text_20_body">Software Development-এ:</text:p>
      <text:list text:style-name="L79">
        <text:list-item>
          <text:p text:style-name="P88">Code Change Track</text:p>
        </text:list-item>
        <text:list-item>
          <text:p text:style-name="P88">Backup</text:p>
        </text:list-item>
        <text:list-item>
          <text:p text:style-name="P88">Collaboration</text:p>
        </text:list-item>
        <text:list-item>
          <text:p text:style-name="P88">Rollback</text:p>
        </text:list-item>
      </text:list>
      <text:p text:style-name="Text_20_body">এর জন্য Git ব্যবহার করা হয়।</text:p>
      <text:p text:style-name="P16"/>
      <text:h text:style-name="P19" text:outline-level="2"><text:soft-page-break/>Git Installation</text:h>
      <text:p text:style-name="Text_20_body">অফিসিয়াল Website:</text:p>
      <text:p text:style-name="Text_20_body"><text:a xlink:type="simple" xlink:href="https://git-scm.com/?utm_source=chatgpt.com" text:style-name="Internet_20_link" text:visited-style-name="Visited_20_Internet_20_Link">Git</text:a></text:p>
      <text:p text:style-name="P16"/>
      <text:h text:style-name="P19" text:outline-level="2">Installation Verify</text:h>
      <text:p text:style-name="P18"><text:span text:style-name="Source_20_Text">git --version</text:span></text:p>
      <text:p text:style-name="P16"/>
      <text:h text:style-name="P19" text:outline-level="2">গুরুত্বপূর্ণ Git Commands</text:h>
      <text:h text:style-name="P17" text:outline-level="3">Repository Initialize</text:h>
      <text:p text:style-name="P18"><text:span text:style-name="Source_20_Text">git init</text:span></text:p>
      <text:p text:style-name="P16"/>
      <text:h text:style-name="P17" text:outline-level="3">File Add</text:h>
      <text:p text:style-name="P18"><text:span text:style-name="Source_20_Text">git add .</text:span></text:p>
      <text:p text:style-name="P16"/>
      <text:h text:style-name="P17" text:outline-level="3">Commit</text:h>
      <text:p text:style-name="P18"><text:span text:style-name="Source_20_Text">git commit -m "Initial Commit"</text:span></text:p>
      <text:p text:style-name="P16"/>
      <text:h text:style-name="P17" text:outline-level="3">Status</text:h>
      <text:p text:style-name="P18"><text:span text:style-name="Source_20_Text">git status</text:span></text:p>
      <text:p text:style-name="P16"/>
      <text:h text:style-name="P17" text:outline-level="3">Log</text:h>
      <text:p text:style-name="P18"><text:span text:style-name="Source_20_Text">git log</text:span></text:p>
      <text:p text:style-name="P16"/>
      <text:h text:style-name="P15" text:outline-level="1">6. GitHub</text:h>
      <text:p text:style-name="P16"/>
      <text:h text:style-name="P19" text:outline-level="2">GitHub কী?</text:h>
      <text:p text:style-name="Text_20_body"><text:a xlink:type="simple" xlink:href="https://github.com/?utm_source=chatgpt.com" text:style-name="Internet_20_link" text:visited-style-name="Visited_20_Internet_20_Link">GitHub</text:a> হলো Git Repository Hosting Platform।</text:p>
      <text:p text:style-name="P16"/>
      <text:h text:style-name="P19" text:outline-level="2">Git এবং GitHub-এর পার্থক্য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Git</text:p>
            </table:table-cell>
            <table:table-cell table:style-name="Table11.A1" office:value-type="string">
              <text:p text:style-name="Table_20_Heading">GitHub</text:p>
            </table:table-cell>
          </table:table-row>
        </table:table-header-rows>
        <table:table-row>
          <table:table-cell table:style-name="Table11.A1" office:value-type="string">
            <text:p text:style-name="Table_20_Contents">Local Version Control</text:p>
          </table:table-cell>
          <table:table-cell table:style-name="Table11.A1" office:value-type="string">
            <text:p text:style-name="Table_20_Contents">Cloud Repository</text:p>
          </table:table-cell>
        </table:table-row>
        <text:soft-page-break/>
        <table:table-row>
          <table:table-cell table:style-name="Table11.A1" office:value-type="string">
            <text:p text:style-name="Table_20_Contents">Software</text:p>
          </table:table-cell>
          <table:table-cell table:style-name="Table11.A1" office:value-type="string">
            <text:p text:style-name="Table_20_Contents">Platform</text:p>
          </table:table-cell>
        </table:table-row>
        <table:table-row>
          <table:table-cell table:style-name="Table11.A1" office:value-type="string">
            <text:p text:style-name="Table_20_Contents">Offline কাজ করে</text:p>
          </table:table-cell>
          <table:table-cell table:style-name="Table11.A1" office:value-type="string">
            <text:p text:style-name="Table_20_Contents">Online Collaboration</text:p>
          </table:table-cell>
        </table:table-row>
      </table:table>
      <text:p text:style-name="P16"/>
      <text:h text:style-name="P19" text:outline-level="2">GitHub-এর সুবিধা</text:h>
      <text:h text:style-name="P17" text:outline-level="3">Code Backup</text:h>
      <text:p text:style-name="Text_20_body">Cloud-এ Code Store হয়।</text:p>
      <text:p text:style-name="P16"/>
      <text:h text:style-name="P17" text:outline-level="3">Collaboration</text:h>
      <text:p text:style-name="Text_20_body">একাধিক Developer একসাথে কাজ করতে পারে।</text:p>
      <text:p text:style-name="P16"/>
      <text:h text:style-name="P17" text:outline-level="3">Portfolio</text:h>
      <text:p text:style-name="Text_20_body">আপনার Project Showcase করতে পারবেন।</text:p>
      <text:p text:style-name="P16"/>
      <text:h text:style-name="P17" text:outline-level="3">Open Source Contribution</text:h>
      <text:p text:style-name="Text_20_body">বিশ্বব্যাপী Open Source Project-এ অবদান রাখা যায়।</text:p>
      <text:p text:style-name="P16"/>
      <text:h text:style-name="P19" text:outline-level="2">GitHub Workflow</text:h>
      <text:p text:style-name="P18"><text:span text:style-name="Source_20_Text">Local Machine</text:span></text:p>
      <text:p text:style-name="P18"/>
      <text:p text:style-name="P18"><text:span text:style-name="Source_20_Text"><text:s text:c="6"/>↓</text:span></text:p>
      <text:p text:style-name="P18"/>
      <text:p text:style-name="P18"><text:span text:style-name="Source_20_Text">Git Commit</text:span></text:p>
      <text:p text:style-name="P18"/>
      <text:p text:style-name="P18"><text:span text:style-name="Source_20_Text"><text:s text:c="6"/>↓</text:span></text:p>
      <text:p text:style-name="P18"/>
      <text:p text:style-name="P18"><text:span text:style-name="Source_20_Text">Git Push</text:span></text:p>
      <text:p text:style-name="P18"/>
      <text:p text:style-name="P18"><text:span text:style-name="Source_20_Text"><text:s text:c="6"/>↓</text:span></text:p>
      <text:p text:style-name="P18"/>
      <text:p text:style-name="P18"><text:span text:style-name="Source_20_Text">GitHub Repository</text:span></text:p>
      <text:p text:style-name="P16"/>
      <text:h text:style-name="P19" text:outline-level="2"><text:soft-page-break/>JavaScript Developer হিসেবে GitHub কেন গুরুত্বপূর্ণ?</text:h>
      <text:p text:style-name="Text_20_body">আপনার GitHub Profile-এ থাকতে পারে:</text:p>
      <text:list text:style-name="L80">
        <text:list-item>
          <text:p text:style-name="P89">JavaScript Practice</text:p>
        </text:list-item>
        <text:list-item>
          <text:p text:style-name="P89">React Project</text:p>
        </text:list-item>
        <text:list-item>
          <text:p text:style-name="P89">Node.js API</text:p>
        </text:list-item>
        <text:list-item>
          <text:p text:style-name="P89">Portfolio Website</text:p>
        </text:list-item>
        <text:list-item>
          <text:p text:style-name="P89">ERP Demo Project</text:p>
        </text:list-item>
      </text:list>
      <text:p text:style-name="Text_20_body">Interview-এ এগুলো বড় ভূমিকা রাখতে পারে।</text:p>
      <text:p text:style-name="P16"/>
      <text:h text:style-name="P15" text:outline-level="1">Recommended Installation Order</text:h>
      <text:p text:style-name="Text_20_body">JavaScript শেখার জন্য Installation Sequence:</text:p>
      <text:h text:style-name="P17" text:outline-level="3">Step 1</text:h>
      <text:p text:style-name="Text_20_body">VS Code</text:p>
      <text:p text:style-name="P16"/>
      <text:h text:style-name="P17" text:outline-level="3">Step 2</text:h>
      <text:p text:style-name="Text_20_body">Node.js (npm সহ)</text:p>
      <text:p text:style-name="P16"/>
      <text:h text:style-name="P17" text:outline-level="3">Step 3</text:h>
      <text:p text:style-name="Text_20_body">Git</text:p>
      <text:p text:style-name="P16"/>
      <text:h text:style-name="P17" text:outline-level="3">Step 4</text:h>
      <text:p text:style-name="Text_20_body">GitHub Account</text:p>
      <text:p text:style-name="P16"/>
      <text:h text:style-name="P17" text:outline-level="3">Step 5</text:h>
      <text:p text:style-name="Text_20_body">Browser DevTools Practice</text:p>
      <text:p text:style-name="P16"/>
      <text:h text:style-name="P15" text:outline-level="1">.NET Developer Perspective</text:h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JavaScript World</text:p>
            </table:table-cell>
            <table:table-cell table:style-name="Table12.A1" office:value-type="string">
              <text:p text:style-name="Table_20_Heading">.NET World</text:p>
            </table:table-cell>
          </table:table-row>
        </table:table-header-rows>
        <table:table-row>
          <table:table-cell table:style-name="Table12.A1" office:value-type="string">
            <text:p text:style-name="Table_20_Contents">VS Code</text:p>
          </table:table-cell>
          <table:table-cell table:style-name="Table12.A1" office:value-type="string">
            <text:p text:style-name="Table_20_Contents">Visual Studio</text:p>
          </table:table-cell>
        </table:table-row>
        <table:table-row>
          <table:table-cell table:style-name="Table12.A1" office:value-type="string">
            <text:p text:style-name="Table_20_Contents">Browser DevTools</text:p>
          </table:table-cell>
          <table:table-cell table:style-name="Table12.A1" office:value-type="string">
            <text:p text:style-name="Table_20_Contents">Browser DevTools</text:p>
          </table:table-cell>
        </table:table-row>
        <text:soft-page-break/>
        <table:table-row>
          <table:table-cell table:style-name="Table12.A1" office:value-type="string">
            <text:p text:style-name="Table_20_Contents">Node.js</text:p>
          </table:table-cell>
          <table:table-cell table:style-name="Table12.A1" office:value-type="string">
            <text:p text:style-name="Table_20_Contents">.NET Runtime</text:p>
          </table:table-cell>
        </table:table-row>
        <table:table-row>
          <table:table-cell table:style-name="Table12.A1" office:value-type="string">
            <text:p text:style-name="Table_20_Contents">npm</text:p>
          </table:table-cell>
          <table:table-cell table:style-name="Table12.A1" office:value-type="string">
            <text:p text:style-name="Table_20_Contents">NuGet</text:p>
          </table:table-cell>
        </table:table-row>
        <table:table-row>
          <table:table-cell table:style-name="Table12.A1" office:value-type="string">
            <text:p text:style-name="Table_20_Contents">Git</text:p>
          </table:table-cell>
          <table:table-cell table:style-name="Table12.A1" office:value-type="string">
            <text:p text:style-name="Table_20_Contents">Git</text:p>
          </table:table-cell>
        </table:table-row>
        <table:table-row>
          <table:table-cell table:style-name="Table12.A1" office:value-type="string">
            <text:p text:style-name="Table_20_Contents">GitHub</text:p>
          </table:table-cell>
          <table:table-cell table:style-name="Table12.A1" office:value-type="string">
            <text:p text:style-name="Table_20_Contents">GitHub/Azure DevOps</text:p>
          </table:table-cell>
        </table:table-row>
      </table:table>
      <text:p text:style-name="P16"/>
      <text:h text:style-name="P15" text:outline-level="1">Summary</text:h>
      <text:p text:style-name="Text_20_body">এই অধ্যায় থেকে যা শিখলাম:</text:p>
      <text:p text:style-name="Text_20_body">✅ VS Code হলো JavaScript Development-এর সবচেয়ে জনপ্রিয় Code Editor।</text:p>
      <text:p text:style-name="Text_20_body">✅ Browser DevTools Debugging এবং API Monitoring-এর জন্য অপরিহার্য।</text:p>
      <text:p text:style-name="Text_20_body">✅ Node.js Browser-এর বাইরে JavaScript Run করতে দেয়।</text:p>
      <text:p text:style-name="Text_20_body">✅ npm Package Management-এর জন্য ব্যবহৃত হয়।</text:p>
      <text:p text:style-name="Text_20_body">✅ Git Version Control System হিসেবে Code Change Track করে।</text:p>
      <text:p text:style-name="Text_20_body">✅ GitHub Code Hosting, Collaboration এবং Portfolio তৈরির Platform।</text:p>
      <text:p text:style-name="Text_20_body">✅ Modern JavaScript Development-এর ভিত্তি হলো VS Code + Node.js + npm + Git + GitHub।</text:p>
      <text:p text:style-name="P16"/>
      <text:h text:style-name="P15" text:outline-level="1">Interview Questions</text:h>
      <text:list text:style-name="L81">
        <text:list-item>
          <text:p text:style-name="P90">VS Code কী এবং কেন জনপ্রিয়?</text:p>
        </text:list-item>
        <text:list-item>
          <text:p text:style-name="P90">Browser DevTools-এর প্রধান Tabs কী কী?</text:p>
        </text:list-item>
        <text:list-item>
          <text:p text:style-name="P90">Node.js কী?</text:p>
        </text:list-item>
        <text:list-item>
          <text:p text:style-name="P90">npm কী?</text:p>
        </text:list-item>
        <text:list-item>
          <text:p text:style-name="P90">Dependency বলতে কী বোঝায়?</text:p>
        </text:list-item>
        <text:list-item>
          <text:p text:style-name="P90">package.json কী?</text:p>
        </text:list-item>
        <text:list-item>
          <text:p text:style-name="P90">package-lock.json কী?</text:p>
        </text:list-item>
        <text:list-item>
          <text:p text:style-name="P90">Git কী?</text:p>
        </text:list-item>
        <text:list-item>
          <text:p text:style-name="P90">GitHub কী?</text:p>
        </text:list-item>
        <text:list-item>
          <text:p text:style-name="P90">Git এবং GitHub-এর মধ্যে পার্থক্য কী?</text:p>
        </text:list-item>
        <text:list-item>
          <text:p text:style-name="P90">JavaScript Development-এ Git কেন গুরুত্বপূর্ণ?</text:p>
        </text:list-item>
        <text:list-item>
          <text:p text:style-name="P90">Node.js Install করার পর npm কেন Automatically Install হয়?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1T17:32:47.004363800</meta:creation-date>
    <dc:date>2026-06-02T09:25:28.425306900</dc:date>
    <meta:editing-duration>PT26M20S</meta:editing-duration>
    <meta:editing-cycles>3</meta:editing-cycles>
    <meta:generator>LibreOffice/26.2.3.2$Windows_X86_64 LibreOffice_project/70e089b17412e4cb7773e41413306b17a2328c34</meta:generator>
    <meta:document-statistic meta:table-count="12" meta:image-count="0" meta:object-count="0" meta:page-count="72" meta:paragraph-count="1662" meta:word-count="5618" meta:character-count="32698" meta:non-whitespace-character-count="28382"/>
  </office:meta>
</office:document-meta>
</file>